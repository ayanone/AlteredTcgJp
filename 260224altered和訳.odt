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JP" svg:font-family="'Noto Sans JP'" style:font-family-generic="system" style:font-pitch="variable"/>
    <style:font-face style:name="Noto Serif JP" svg:font-family="'Noto Serif JP'" style:font-family-generic="system" style:font-pitch="variable"/>
    <style:font-face style:name="游ゴシック Light" svg:font-family="'游ゴシック Light'" style:font-family-generic="modern" style:font-pitch="variable"/>
    <style:font-face style:name="游ゴシック Light1" svg:font-family="'游ゴシック Light'" style:font-adornments="Regular" style:font-family-generic="modern" style:font-pitch="variable"/>
  </office:font-face-decls>
  <office:automatic-styles>
    <style:style style:name="P1" style:family="paragraph" style:parent-style-name="Standard">
      <style:text-properties style:font-name="游ゴシック Light" fo:font-size="6pt" style:font-name-asian="游ゴシック Light" style:font-size-asian="6pt" style:font-size-complex="6pt"/>
    </style:style>
    <style:style style:name="P2" style:family="paragraph" style:parent-style-name="Standard">
      <style:text-properties style:font-name="游ゴシック Light" fo:font-size="6pt" officeooo:paragraph-rsid="000293ae" style:font-name-asian="游ゴシック Light" style:font-size-asian="6pt" style:font-size-complex="6pt"/>
    </style:style>
    <style:style style:name="P3" style:family="paragraph" style:parent-style-name="Standard">
      <style:text-properties style:font-name="游ゴシック Light" fo:font-size="6pt" officeooo:rsid="000293ae" officeooo:paragraph-rsid="000293ae" style:font-name-asian="游ゴシック Light" style:font-size-asian="6pt" style:font-size-complex="6pt"/>
    </style:style>
    <style:style style:name="P4" style:family="paragraph" style:parent-style-name="Standard">
      <style:text-properties style:font-name="游ゴシック Light" fo:font-size="6pt" officeooo:rsid="000293ae" officeooo:paragraph-rsid="0002dd05" style:font-name-asian="游ゴシック Light" style:font-size-asian="6pt" style:font-size-complex="6pt"/>
    </style:style>
    <style:style style:name="P5" style:family="paragraph" style:parent-style-name="Standard">
      <style:text-properties style:font-name="游ゴシック Light" fo:font-size="6pt" officeooo:rsid="000293ae" officeooo:paragraph-rsid="000379a1" style:font-name-asian="游ゴシック Light" style:font-size-asian="6pt" style:font-size-complex="6pt"/>
    </style:style>
    <style:style style:name="P6" style:family="paragraph" style:parent-style-name="Standard">
      <style:text-properties style:font-name="游ゴシック Light" fo:font-size="6pt" officeooo:rsid="000293ae" officeooo:paragraph-rsid="001948c1" style:font-name-asian="游ゴシック Light" style:font-size-asian="6pt" style:font-size-complex="6pt"/>
    </style:style>
    <style:style style:name="P7" style:family="paragraph" style:parent-style-name="Standard">
      <style:text-properties style:font-name="游ゴシック Light" fo:font-size="6pt" officeooo:rsid="000293ae" officeooo:paragraph-rsid="001a6a34" style:font-name-asian="游ゴシック Light" style:font-size-asian="6pt" style:font-size-complex="6pt"/>
    </style:style>
    <style:style style:name="P8" style:family="paragraph" style:parent-style-name="Standard">
      <style:text-properties style:font-name="游ゴシック Light" fo:font-size="6pt" officeooo:rsid="000293ae" officeooo:paragraph-rsid="001f6731" style:font-name-asian="游ゴシック Light" style:font-size-asian="6pt" style:font-size-complex="6pt"/>
    </style:style>
    <style:style style:name="P9" style:family="paragraph" style:parent-style-name="Standard">
      <style:text-properties style:font-name="游ゴシック Light" fo:font-size="6pt" officeooo:rsid="000293ae" officeooo:paragraph-rsid="002a4091" style:font-name-asian="游ゴシック Light" style:font-size-asian="6pt" style:font-size-complex="6pt"/>
    </style:style>
    <style:style style:name="P10" style:family="paragraph" style:parent-style-name="Standard">
      <style:text-properties style:font-name="游ゴシック Light" fo:font-size="6pt" officeooo:paragraph-rsid="0002dd05" style:font-name-asian="游ゴシック Light" style:font-size-asian="6pt" style:font-size-complex="6pt"/>
    </style:style>
    <style:style style:name="P11" style:family="paragraph" style:parent-style-name="Standard">
      <style:text-properties style:font-name="游ゴシック Light" fo:font-size="6pt" officeooo:rsid="0002dd05" officeooo:paragraph-rsid="0002dd05" style:font-name-asian="游ゴシック Light" style:font-size-asian="6pt" style:font-size-complex="6pt"/>
    </style:style>
    <style:style style:name="P12" style:family="paragraph" style:parent-style-name="Standard">
      <style:text-properties style:font-name="游ゴシック Light" fo:font-size="6pt" officeooo:rsid="0002dd05" officeooo:paragraph-rsid="002a4091" style:font-name-asian="游ゴシック Light" style:font-size-asian="6pt" style:font-size-complex="6pt"/>
    </style:style>
    <style:style style:name="P13" style:family="paragraph" style:parent-style-name="Standard">
      <style:text-properties style:font-name="游ゴシック Light" fo:font-size="6pt" officeooo:rsid="000379a1" officeooo:paragraph-rsid="000379a1" style:font-name-asian="游ゴシック Light" style:font-size-asian="6pt" style:font-size-complex="6pt"/>
    </style:style>
    <style:style style:name="P14" style:family="paragraph" style:parent-style-name="Standard">
      <style:text-properties style:font-name="游ゴシック Light" fo:font-size="6pt" officeooo:paragraph-rsid="000379a1" style:font-name-asian="游ゴシック Light" style:font-size-asian="6pt" style:font-size-complex="6pt"/>
    </style:style>
    <style:style style:name="P15" style:family="paragraph" style:parent-style-name="Standard">
      <style:text-properties style:font-name="游ゴシック Light" fo:font-size="6pt" officeooo:paragraph-rsid="0004dc93" style:font-name-asian="游ゴシック Light" style:font-size-asian="6pt" style:font-size-complex="6pt"/>
    </style:style>
    <style:style style:name="P16" style:family="paragraph" style:parent-style-name="Standard">
      <style:text-properties style:font-name="游ゴシック Light" fo:font-size="6pt" officeooo:rsid="000cb3f5" officeooo:paragraph-rsid="000cb3f5" style:font-name-asian="游ゴシック Light" style:font-size-asian="6pt" style:font-size-complex="6pt"/>
    </style:style>
    <style:style style:name="P17" style:family="paragraph" style:parent-style-name="Standard">
      <style:text-properties style:font-name="游ゴシック Light" fo:font-size="6pt" officeooo:rsid="000cb3f5" officeooo:paragraph-rsid="000fee19" style:font-name-asian="游ゴシック Light" style:font-size-asian="6pt" style:font-size-complex="6pt"/>
    </style:style>
    <style:style style:name="P18" style:family="paragraph" style:parent-style-name="Standard">
      <style:text-properties style:font-name="游ゴシック Light" fo:font-size="6pt" officeooo:rsid="000cb3f5" officeooo:paragraph-rsid="0011c7bf" style:font-name-asian="游ゴシック Light" style:font-size-asian="6pt" style:font-size-complex="6pt"/>
    </style:style>
    <style:style style:name="P19" style:family="paragraph" style:parent-style-name="Standard">
      <style:text-properties style:font-name="游ゴシック Light" fo:font-size="6pt" officeooo:rsid="000cb3f5" officeooo:paragraph-rsid="00135af6" style:font-name-asian="游ゴシック Light" style:font-size-asian="6pt" style:font-size-complex="6pt"/>
    </style:style>
    <style:style style:name="P20" style:family="paragraph" style:parent-style-name="Standard">
      <style:text-properties style:font-name="游ゴシック Light" fo:font-size="6pt" officeooo:rsid="000cb3f5" officeooo:paragraph-rsid="001dded7" style:font-name-asian="游ゴシック Light" style:font-size-asian="6pt" style:font-size-complex="6pt"/>
    </style:style>
    <style:style style:name="P21" style:family="paragraph" style:parent-style-name="Standard">
      <style:text-properties style:font-name="游ゴシック Light" fo:font-size="6pt" officeooo:rsid="000cb3f5" officeooo:paragraph-rsid="002a4091" style:font-name-asian="游ゴシック Light" style:font-size-asian="6pt" style:font-size-complex="6pt"/>
    </style:style>
    <style:style style:name="P22" style:family="paragraph" style:parent-style-name="Standard">
      <style:text-properties style:font-name="游ゴシック Light" fo:font-size="6pt" officeooo:paragraph-rsid="000eb099" style:font-name-asian="游ゴシック Light" style:font-size-asian="6pt" style:font-size-complex="6pt"/>
    </style:style>
    <style:style style:name="P23" style:family="paragraph" style:parent-style-name="Standard">
      <style:text-properties style:font-name="游ゴシック Light" fo:font-size="6pt" officeooo:paragraph-rsid="000fee19" style:font-name-asian="游ゴシック Light" style:font-size-asian="6pt" style:font-size-complex="6pt"/>
    </style:style>
    <style:style style:name="P24" style:family="paragraph" style:parent-style-name="Standard">
      <style:text-properties style:font-name="游ゴシック Light" fo:font-size="6pt" officeooo:rsid="000fee19" officeooo:paragraph-rsid="000fee19" style:font-name-asian="游ゴシック Light" style:font-size-asian="6pt" style:font-size-complex="6pt"/>
    </style:style>
    <style:style style:name="P25" style:family="paragraph" style:parent-style-name="Standard">
      <style:text-properties style:font-name="游ゴシック Light" fo:font-size="6pt" officeooo:rsid="0011c7bf" officeooo:paragraph-rsid="0011c7bf" style:font-name-asian="游ゴシック Light" style:font-size-asian="6pt" style:font-size-complex="6pt"/>
    </style:style>
    <style:style style:name="P26" style:family="paragraph" style:parent-style-name="Standard">
      <style:text-properties style:font-name="游ゴシック Light" fo:font-size="6pt" officeooo:paragraph-rsid="0011c7bf" style:font-name-asian="游ゴシック Light" style:font-size-asian="6pt" style:font-size-complex="6pt"/>
    </style:style>
    <style:style style:name="P27" style:family="paragraph" style:parent-style-name="Standard">
      <style:text-properties style:font-name="游ゴシック Light" fo:font-size="6pt" officeooo:rsid="00135af6" officeooo:paragraph-rsid="00135af6" style:font-name-asian="游ゴシック Light" style:font-size-asian="6pt" style:font-size-complex="6pt"/>
    </style:style>
    <style:style style:name="P28" style:family="paragraph" style:parent-style-name="Standard">
      <style:text-properties style:font-name="游ゴシック Light" fo:font-size="6pt" officeooo:rsid="00135af6" officeooo:paragraph-rsid="00219b81" style:font-name-asian="游ゴシック Light" style:font-size-asian="6pt" style:font-size-complex="6pt"/>
    </style:style>
    <style:style style:name="P29" style:family="paragraph" style:parent-style-name="Standard">
      <style:text-properties style:font-name="游ゴシック Light" fo:font-size="6pt" officeooo:paragraph-rsid="00135af6" style:font-name-asian="游ゴシック Light" style:font-size-asian="6pt" style:font-size-complex="6pt"/>
    </style:style>
    <style:style style:name="P30" style:family="paragraph" style:parent-style-name="Standard">
      <style:text-properties style:font-name="游ゴシック Light" fo:font-size="6pt" officeooo:rsid="000583cd" officeooo:paragraph-rsid="00135af6" style:font-name-asian="游ゴシック Light" style:font-size-asian="6pt" style:font-size-complex="6pt"/>
    </style:style>
    <style:style style:name="P31" style:family="paragraph" style:parent-style-name="Standard">
      <style:text-properties style:font-name="游ゴシック Light" fo:font-size="6pt" officeooo:rsid="0014166c" officeooo:paragraph-rsid="0014166c" style:font-name-asian="游ゴシック Light" style:font-size-asian="6pt" style:font-size-complex="6pt"/>
    </style:style>
    <style:style style:name="P32" style:family="paragraph" style:parent-style-name="Standard">
      <style:text-properties style:font-name="游ゴシック Light" fo:font-size="6pt" officeooo:rsid="0014166c" officeooo:paragraph-rsid="00145a3e" style:font-name-asian="游ゴシック Light" style:font-size-asian="6pt" style:font-size-complex="6pt"/>
    </style:style>
    <style:style style:name="P33" style:family="paragraph" style:parent-style-name="Standard">
      <style:text-properties style:font-name="游ゴシック Light" fo:font-size="6pt" officeooo:rsid="001604f1" officeooo:paragraph-rsid="001604f1" style:font-name-asian="游ゴシック Light" style:font-size-asian="6pt" style:font-size-complex="6pt"/>
    </style:style>
    <style:style style:name="P34" style:family="paragraph" style:parent-style-name="Standard">
      <style:text-properties style:font-name="游ゴシック Light" fo:font-size="6pt" officeooo:rsid="001604f1" officeooo:paragraph-rsid="002a4091" style:font-name-asian="游ゴシック Light" style:font-size-asian="6pt" style:font-size-complex="6pt"/>
    </style:style>
    <style:style style:name="P35" style:family="paragraph" style:parent-style-name="Standard">
      <style:text-properties style:font-name="游ゴシック Light" fo:font-size="6pt" officeooo:paragraph-rsid="001604f1" style:font-name-asian="游ゴシック Light" style:font-size-asian="6pt" style:font-size-complex="6pt"/>
    </style:style>
    <style:style style:name="P36" style:family="paragraph" style:parent-style-name="Standard">
      <style:text-properties style:font-name="游ゴシック Light" fo:font-size="6pt" officeooo:rsid="0017d98d" officeooo:paragraph-rsid="0017d98d" style:font-name-asian="游ゴシック Light" style:font-size-asian="6pt" style:font-size-complex="6pt"/>
    </style:style>
    <style:style style:name="P37" style:family="paragraph" style:parent-style-name="Standard">
      <style:text-properties style:font-name="游ゴシック Light" fo:font-size="6pt" officeooo:rsid="001a6a34" officeooo:paragraph-rsid="001a6a34" style:font-name-asian="游ゴシック Light" style:font-size-asian="6pt" style:font-size-complex="6pt"/>
    </style:style>
    <style:style style:name="P38" style:family="paragraph" style:parent-style-name="Standard">
      <style:text-properties style:font-name="游ゴシック Light" fo:font-size="6pt" officeooo:rsid="001a6a34" officeooo:paragraph-rsid="002a4091" style:font-name-asian="游ゴシック Light" style:font-size-asian="6pt" style:font-size-complex="6pt"/>
    </style:style>
    <style:style style:name="P39" style:family="paragraph" style:parent-style-name="Standard">
      <style:text-properties style:font-name="游ゴシック Light" fo:font-size="6pt" officeooo:paragraph-rsid="001a6a34" style:font-name-asian="游ゴシック Light" style:font-size-asian="6pt" style:font-size-complex="6pt"/>
    </style:style>
    <style:style style:name="P40" style:family="paragraph" style:parent-style-name="Standard">
      <style:text-properties style:font-name="游ゴシック Light" fo:font-size="6pt" officeooo:rsid="001a9126" officeooo:paragraph-rsid="001a9126" style:font-name-asian="游ゴシック Light" style:font-size-asian="6pt" style:font-size-complex="6pt"/>
    </style:style>
    <style:style style:name="P41" style:family="paragraph" style:parent-style-name="Standard">
      <style:text-properties style:font-name="游ゴシック Light" fo:font-size="6pt" officeooo:rsid="001a9126" officeooo:paragraph-rsid="002a4091" style:font-name-asian="游ゴシック Light" style:font-size-asian="6pt" style:font-size-complex="6pt"/>
    </style:style>
    <style:style style:name="P42" style:family="paragraph" style:parent-style-name="Standard">
      <style:text-properties style:font-name="游ゴシック Light" fo:font-size="6pt" officeooo:paragraph-rsid="001a9126" style:font-name-asian="游ゴシック Light" style:font-size-asian="6pt" style:font-size-complex="6pt"/>
    </style:style>
    <style:style style:name="P43" style:family="paragraph" style:parent-style-name="Standard">
      <style:text-properties style:font-name="游ゴシック Light" fo:font-size="6pt" officeooo:rsid="001dded7" officeooo:paragraph-rsid="001dded7" style:font-name-asian="游ゴシック Light" style:font-size-asian="6pt" style:font-size-complex="6pt"/>
    </style:style>
    <style:style style:name="P44" style:family="paragraph" style:parent-style-name="Standard">
      <style:text-properties style:font-name="游ゴシック Light" fo:font-size="6pt" officeooo:rsid="001dded7" officeooo:paragraph-rsid="002a4091" style:font-name-asian="游ゴシック Light" style:font-size-asian="6pt" style:font-size-complex="6pt"/>
    </style:style>
    <style:style style:name="P45" style:family="paragraph" style:parent-style-name="Standard">
      <style:text-properties style:font-name="游ゴシック Light" fo:font-size="6pt" officeooo:paragraph-rsid="001dded7" style:font-name-asian="游ゴシック Light" style:font-size-asian="6pt" style:font-size-complex="6pt"/>
    </style:style>
    <style:style style:name="P46" style:family="paragraph" style:parent-style-name="Standard">
      <style:text-properties style:font-name="游ゴシック Light" fo:font-size="6pt" officeooo:rsid="00145a3e" officeooo:paragraph-rsid="00145a3e" style:font-name-asian="游ゴシック Light" style:font-size-asian="6pt" style:font-size-complex="6pt"/>
    </style:style>
    <style:style style:name="P47" style:family="paragraph" style:parent-style-name="Standard">
      <style:text-properties style:font-name="游ゴシック Light" fo:font-size="6pt" officeooo:paragraph-rsid="001f6731" style:font-name-asian="游ゴシック Light" style:font-size-asian="6pt" style:font-size-complex="6pt"/>
    </style:style>
    <style:style style:name="P48" style:family="paragraph" style:parent-style-name="Standard">
      <style:text-properties style:font-name="游ゴシック Light" fo:font-size="6pt" officeooo:rsid="0025bc74" officeooo:paragraph-rsid="002a4091" style:font-name-asian="游ゴシック Light" style:font-size-asian="6pt" style:font-size-complex="6pt"/>
    </style:style>
    <style:style style:name="P49" style:family="paragraph" style:parent-style-name="Standard">
      <style:text-properties style:font-name="游ゴシック Light" fo:font-size="6pt" officeooo:rsid="0027e21d" officeooo:paragraph-rsid="002a4091" style:font-name-asian="游ゴシック Light" style:font-size-asian="6pt" style:font-size-complex="6pt"/>
    </style:style>
    <style:style style:name="P50" style:family="paragraph" style:parent-style-name="Standard">
      <style:text-properties style:font-name="游ゴシック Light" fo:font-size="6pt" officeooo:rsid="002af951" officeooo:paragraph-rsid="002a4091" style:font-name-asian="游ゴシック Light" style:font-size-asian="6pt" style:font-size-complex="6pt"/>
    </style:style>
    <style:style style:name="P51" style:family="paragraph" style:parent-style-name="Standard">
      <style:text-properties style:font-name="游ゴシック Light" fo:font-size="6pt" officeooo:rsid="0036520a" officeooo:paragraph-rsid="002a4091" style:font-name-asian="游ゴシック Light" style:font-size-asian="6pt" style:font-size-complex="6pt"/>
    </style:style>
    <style:style style:name="P52" style:family="paragraph" style:parent-style-name="Standard">
      <style:text-properties style:font-name="游ゴシック Light" fo:font-size="6pt" officeooo:rsid="0037e6b8" officeooo:paragraph-rsid="002a4091" style:font-name-asian="游ゴシック Light" style:font-size-asian="6pt" style:font-size-complex="6pt"/>
    </style:style>
    <style:style style:name="P53" style:family="paragraph" style:parent-style-name="Standard">
      <style:text-properties style:font-name="游ゴシック Light" fo:font-size="6pt" officeooo:paragraph-rsid="002a4091" style:font-name-asian="游ゴシック Light" style:font-size-asian="6pt" style:font-size-complex="6pt"/>
    </style:style>
    <style:style style:name="P54" style:family="paragraph" style:parent-style-name="Standard">
      <style:text-properties style:font-name="游ゴシック Light" fo:font-size="6pt" officeooo:rsid="004de9c3" officeooo:paragraph-rsid="002a4091" style:font-name-asian="游ゴシック Light" style:font-size-asian="6pt" style:font-size-complex="6pt"/>
    </style:style>
    <style:style style:name="P55" style:family="paragraph" style:parent-style-name="Standard">
      <style:text-properties style:font-name="游ゴシック Light" fo:font-size="6pt" officeooo:rsid="004e91e9" officeooo:paragraph-rsid="002a4091" style:font-name-asian="游ゴシック Light" style:font-size-asian="6pt" style:font-size-complex="6pt"/>
    </style:style>
    <style:style style:name="P56" style:family="paragraph" style:parent-style-name="Standard">
      <style:text-properties style:font-name="游ゴシック Light" fo:font-size="6pt" officeooo:rsid="0050ed02" officeooo:paragraph-rsid="002a4091" style:font-name-asian="游ゴシック Light" style:font-size-asian="6pt" style:font-size-complex="6pt"/>
    </style:style>
    <style:style style:name="P57" style:family="paragraph" style:parent-style-name="Standard">
      <style:text-properties style:font-name="游ゴシック Light" fo:font-size="6pt" officeooo:rsid="005958a1" officeooo:paragraph-rsid="002a4091" style:font-name-asian="游ゴシック Light" style:font-size-asian="6pt" style:font-size-complex="6pt"/>
    </style:style>
    <style:style style:name="P58" style:family="paragraph" style:parent-style-name="Standard">
      <style:text-properties style:font-name="游ゴシック Light" fo:font-size="6pt" officeooo:rsid="0064269a" officeooo:paragraph-rsid="002a4091" style:font-name-asian="游ゴシック Light" style:font-size-asian="6pt" style:font-size-complex="6pt"/>
    </style:style>
    <style:style style:name="P59" style:family="paragraph" style:parent-style-name="Standard">
      <style:text-properties style:font-name="游ゴシック Light" fo:font-size="6pt" officeooo:rsid="006540fd" officeooo:paragraph-rsid="002a4091" style:font-name-asian="游ゴシック Light" style:font-size-asian="6pt" style:font-size-complex="6pt"/>
    </style:style>
    <style:style style:name="P60" style:family="paragraph" style:parent-style-name="Standard">
      <style:text-properties style:font-name="游ゴシック Light" fo:font-size="6pt" officeooo:rsid="007317d7" officeooo:paragraph-rsid="002a4091" style:font-name-asian="游ゴシック Light" style:font-size-asian="6pt" style:font-size-complex="6pt"/>
    </style:style>
    <style:style style:name="P61" style:family="paragraph" style:parent-style-name="Standard">
      <style:text-properties style:font-name="游ゴシック Light" fo:font-size="6pt" officeooo:rsid="0078ee4a" officeooo:paragraph-rsid="002a4091" style:font-name-asian="游ゴシック Light" style:font-size-asian="6pt" style:font-size-complex="6pt"/>
    </style:style>
    <style:style style:name="P62" style:family="paragraph" style:parent-style-name="Standard">
      <style:text-properties style:font-name="游ゴシック Light" fo:font-size="6pt" officeooo:rsid="007b0fc6" officeooo:paragraph-rsid="002a4091" style:font-name-asian="游ゴシック Light" style:font-size-asian="6pt" style:font-size-complex="6pt"/>
    </style:style>
    <style:style style:name="P63" style:family="paragraph" style:parent-style-name="Standard">
      <style:text-properties style:font-name="游ゴシック Light" fo:font-size="6pt" officeooo:rsid="00873f56" officeooo:paragraph-rsid="002a4091" style:font-name-asian="游ゴシック Light" style:font-size-asian="6pt" style:font-size-complex="6pt"/>
    </style:style>
    <style:style style:name="P64" style:family="paragraph" style:parent-style-name="Standard">
      <style:text-properties style:font-name="游ゴシック Light" fo:font-size="6pt" officeooo:rsid="008a4a72" officeooo:paragraph-rsid="002a4091" style:font-name-asian="游ゴシック Light" style:font-size-asian="6pt" style:font-size-complex="6pt"/>
    </style:style>
    <style:style style:name="P65" style:family="paragraph" style:parent-style-name="Standard">
      <style:text-properties style:font-name="游ゴシック Light" fo:font-size="6pt" officeooo:rsid="008ae9f4" officeooo:paragraph-rsid="002a4091" style:font-name-asian="游ゴシック Light" style:font-size-asian="6pt" style:font-size-complex="6pt"/>
    </style:style>
    <style:style style:name="P66" style:family="paragraph" style:parent-style-name="Standard">
      <style:text-properties style:font-name="游ゴシック Light" fo:font-size="6pt" officeooo:rsid="008c6ded" officeooo:paragraph-rsid="002a4091" style:font-name-asian="游ゴシック Light" style:font-size-asian="6pt" style:font-size-complex="6pt"/>
    </style:style>
    <style:style style:name="P67" style:family="paragraph" style:parent-style-name="Standard">
      <style:text-properties style:font-name="游ゴシック Light" fo:font-size="6pt" officeooo:rsid="008fb09a" officeooo:paragraph-rsid="002a4091" style:font-name-asian="游ゴシック Light" style:font-size-asian="6pt" style:font-size-complex="6pt"/>
    </style:style>
    <style:style style:name="P68" style:family="paragraph" style:parent-style-name="Standard">
      <style:text-properties style:font-name="游ゴシック Light" fo:font-size="6pt" officeooo:rsid="0091bc79" officeooo:paragraph-rsid="002a4091" style:font-name-asian="游ゴシック Light" style:font-size-asian="6pt" style:font-size-complex="6pt"/>
    </style:style>
    <style:style style:name="P69" style:family="paragraph" style:parent-style-name="Standard">
      <style:text-properties style:font-name="游ゴシック Light" fo:font-size="6pt" style:text-underline-style="solid" style:text-underline-width="auto" style:text-underline-color="font-color" style:font-name-asian="游ゴシック Light" style:font-size-asian="6pt" style:font-size-complex="6pt"/>
    </style:style>
    <style:style style:name="P70" style:family="paragraph" style:parent-style-name="Standard">
      <style:text-properties style:font-name="游ゴシック Light" fo:font-size="6pt" style:text-underline-style="solid" style:text-underline-width="auto" style:text-underline-color="font-color" officeooo:rsid="000cb3f5" officeooo:paragraph-rsid="001dded7" style:font-name-asian="游ゴシック Light" style:font-size-asian="6pt" style:font-size-complex="6pt"/>
    </style:style>
    <style:style style:name="P71" style:family="paragraph" style:parent-style-name="Standard">
      <style:text-properties style:font-name="游ゴシック Light" fo:font-size="6pt" style:text-underline-style="solid" style:text-underline-width="auto" style:text-underline-color="font-color" officeooo:rsid="000293ae" officeooo:paragraph-rsid="002a4091" style:font-name-asian="游ゴシック Light" style:font-size-asian="6pt" style:font-size-complex="6pt"/>
    </style:style>
    <style:style style:name="P72" style:family="paragraph" style:parent-style-name="Standard">
      <style:text-properties style:font-name="游ゴシック Light" fo:font-size="6pt" style:text-underline-style="none" officeooo:rsid="000293ae" officeooo:paragraph-rsid="002a4091" style:font-name-asian="游ゴシック Light" style:font-size-asian="6pt" style:font-size-complex="6pt"/>
    </style:style>
    <style:style style:name="P73" style:family="paragraph" style:parent-style-name="Standard">
      <style:text-properties style:font-name="游ゴシック Light1" fo:font-size="6pt" officeooo:rsid="003940fd" officeooo:paragraph-rsid="002a4091" style:font-name-asian="游ゴシック Light1" style:font-size-asian="6pt" style:font-size-complex="6pt"/>
    </style:style>
    <style:style style:name="P74" style:family="paragraph" style:parent-style-name="Standard">
      <style:text-properties style:font-name="游ゴシック Light1" fo:font-size="6pt" officeooo:paragraph-rsid="002a4091" style:font-name-asian="游ゴシック Light1" style:font-size-asian="6pt" style:font-size-complex="6pt"/>
    </style:style>
    <style:style style:name="P75" style:family="paragraph" style:parent-style-name="Standard">
      <style:text-properties style:font-name="游ゴシック Light1" fo:font-size="6pt" officeooo:rsid="0055afa7" officeooo:paragraph-rsid="002a4091" style:font-name-asian="游ゴシック Light1" style:font-size-asian="6pt" style:font-size-complex="6pt"/>
    </style:style>
    <style:style style:name="P76" style:family="paragraph" style:parent-style-name="Standard">
      <style:text-properties style:font-name="游ゴシック Light1" fo:font-size="6pt" officeooo:rsid="00686e4b" officeooo:paragraph-rsid="002a4091" style:font-name-asian="游ゴシック Light1" style:font-size-asian="6pt" style:font-size-complex="6pt"/>
    </style:style>
    <style:style style:name="P77" style:family="paragraph" style:parent-style-name="Standard">
      <style:text-properties style:font-name="游ゴシック Light1" fo:font-size="6pt" officeooo:rsid="00695b22" officeooo:paragraph-rsid="002a4091" style:font-name-asian="游ゴシック Light1" style:font-size-asian="6pt" style:font-size-complex="6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293ae"/>
    </style:style>
    <style:style style:name="T3" style:family="text">
      <style:text-properties style:text-underline-style="solid" style:text-underline-width="auto" style:text-underline-color="font-color" officeooo:rsid="000fee19"/>
    </style:style>
    <style:style style:name="T4" style:family="text">
      <style:text-properties style:text-underline-style="solid" style:text-underline-width="auto" style:text-underline-color="font-color" officeooo:rsid="001dded7"/>
    </style:style>
    <style:style style:name="T5" style:family="text">
      <style:text-properties style:text-underline-style="solid" style:text-underline-width="auto" style:text-underline-color="font-color" officeooo:rsid="0028ac42"/>
    </style:style>
    <style:style style:name="T6" style:family="text">
      <style:text-properties style:text-underline-style="solid" style:text-underline-width="auto" style:text-underline-color="font-color" officeooo:rsid="002c7130"/>
    </style:style>
    <style:style style:name="T7" style:family="text">
      <style:text-properties style:text-underline-style="solid" style:text-underline-width="auto" style:text-underline-color="font-color" officeooo:rsid="0039c52c"/>
    </style:style>
    <style:style style:name="T8" style:family="text">
      <style:text-properties style:text-underline-style="solid" style:text-underline-width="auto" style:text-underline-color="font-color" officeooo:rsid="00470dfd"/>
    </style:style>
    <style:style style:name="T9" style:family="text">
      <style:text-properties style:text-underline-style="solid" style:text-underline-width="auto" style:text-underline-color="font-color" officeooo:rsid="005be9d7"/>
    </style:style>
    <style:style style:name="T10" style:family="text">
      <style:text-properties style:text-underline-style="solid" style:text-underline-width="auto" style:text-underline-color="font-color" officeooo:rsid="00686e4b"/>
    </style:style>
    <style:style style:name="T11" style:family="text">
      <style:text-properties style:text-underline-style="solid" style:text-underline-width="auto" style:text-underline-color="font-color" officeooo:rsid="0002dd05"/>
    </style:style>
    <style:style style:name="T12" style:family="text">
      <style:text-properties style:text-underline-style="solid" style:text-underline-width="auto" style:text-underline-color="font-color" officeooo:rsid="000cb3f5"/>
    </style:style>
    <style:style style:name="T13" style:family="text">
      <style:text-properties style:text-underline-style="solid" style:text-underline-width="auto" style:text-underline-color="font-color" officeooo:rsid="007fb45f"/>
    </style:style>
    <style:style style:name="T14" style:family="text">
      <style:text-properties style:text-underline-style="solid" style:text-underline-width="auto" style:text-underline-color="font-color" officeooo:rsid="0085d04e"/>
    </style:style>
    <style:style style:name="T15" style:family="text">
      <style:text-properties officeooo:rsid="000293ae"/>
    </style:style>
    <style:style style:name="T16" style:family="text">
      <style:text-properties style:text-underline-style="none"/>
    </style:style>
    <style:style style:name="T17" style:family="text">
      <style:text-properties style:font-name="游ゴシック Light" fo:font-size="6pt" officeooo:rsid="000293ae" style:font-name-asian="游ゴシック Light" style:font-size-asian="6pt" style:font-size-complex="6pt"/>
    </style:style>
    <style:style style:name="T18" style:family="text">
      <style:text-properties officeooo:rsid="0002dd05"/>
    </style:style>
    <style:style style:name="T19" style:family="text">
      <style:text-properties officeooo:rsid="000379a1"/>
    </style:style>
    <style:style style:name="T20" style:family="text">
      <style:text-properties officeooo:rsid="000fee19"/>
    </style:style>
    <style:style style:name="T21" style:family="text">
      <style:text-properties officeooo:rsid="0011c7bf"/>
    </style:style>
    <style:style style:name="T22" style:family="text">
      <style:text-properties officeooo:rsid="00135af6"/>
    </style:style>
    <style:style style:name="T23" style:family="text">
      <style:text-properties officeooo:rsid="00145a3e"/>
    </style:style>
    <style:style style:name="T24" style:family="text">
      <style:text-properties officeooo:rsid="0017d98d"/>
    </style:style>
    <style:style style:name="T25" style:family="text">
      <style:text-properties officeooo:rsid="001a6a34"/>
    </style:style>
    <style:style style:name="T26" style:family="text">
      <style:text-properties officeooo:rsid="001a9126"/>
    </style:style>
    <style:style style:name="T27" style:family="text">
      <style:text-properties officeooo:rsid="001dded7"/>
    </style:style>
    <style:style style:name="T28" style:family="text">
      <style:text-properties officeooo:rsid="000cb3f5"/>
    </style:style>
    <style:style style:name="T29" style:family="text">
      <style:text-properties officeooo:rsid="00499e30"/>
    </style:style>
    <style:style style:name="T30" style:family="text">
      <style:text-properties officeooo:rsid="0025bc74"/>
    </style:style>
    <style:style style:name="T31" style:family="text">
      <style:text-properties officeooo:rsid="0027e21d"/>
    </style:style>
    <style:style style:name="T32" style:family="text">
      <style:text-properties officeooo:rsid="0014166c"/>
    </style:style>
    <style:style style:name="T33" style:family="text">
      <style:text-properties officeooo:rsid="0028ac42"/>
    </style:style>
    <style:style style:name="T34" style:family="text">
      <style:text-properties officeooo:rsid="002af951"/>
    </style:style>
    <style:style style:name="T35" style:family="text">
      <style:text-properties officeooo:rsid="002bb68e"/>
    </style:style>
    <style:style style:name="T36" style:family="text">
      <style:text-properties officeooo:rsid="002c7130"/>
    </style:style>
    <style:style style:name="T37" style:family="text">
      <style:text-properties officeooo:rsid="002dba0b"/>
    </style:style>
    <style:style style:name="T38" style:family="text">
      <style:text-properties officeooo:rsid="002e5cf5"/>
    </style:style>
    <style:style style:name="T39" style:family="text">
      <style:text-properties officeooo:rsid="003179aa"/>
    </style:style>
    <style:style style:name="T40" style:family="text">
      <style:text-properties officeooo:rsid="0039c52c"/>
    </style:style>
    <style:style style:name="T41" style:family="text">
      <style:text-properties officeooo:rsid="003db932"/>
    </style:style>
    <style:style style:name="T42" style:family="text">
      <style:text-properties officeooo:rsid="0042b94a"/>
    </style:style>
    <style:style style:name="T43" style:family="text">
      <style:text-properties officeooo:rsid="0045d132"/>
    </style:style>
    <style:style style:name="T44" style:family="text">
      <style:text-properties officeooo:rsid="00470dfd"/>
    </style:style>
    <style:style style:name="T45" style:family="text">
      <style:text-properties officeooo:rsid="004e91e9"/>
    </style:style>
    <style:style style:name="T46" style:family="text">
      <style:text-properties officeooo:rsid="004fb771"/>
    </style:style>
    <style:style style:name="T47" style:family="text">
      <style:text-properties officeooo:rsid="0050ed02"/>
    </style:style>
    <style:style style:name="T48" style:family="text">
      <style:text-properties officeooo:rsid="00528369"/>
    </style:style>
    <style:style style:name="T49" style:family="text">
      <style:text-properties officeooo:rsid="0054423e"/>
    </style:style>
    <style:style style:name="T50" style:family="text">
      <style:text-properties officeooo:rsid="00577806"/>
    </style:style>
    <style:style style:name="T51" style:family="text">
      <style:text-properties officeooo:rsid="00587f77"/>
    </style:style>
    <style:style style:name="T52" style:family="text">
      <style:text-properties officeooo:rsid="000583cd"/>
    </style:style>
    <style:style style:name="T53" style:family="text">
      <style:text-properties officeooo:rsid="005958a1"/>
    </style:style>
    <style:style style:name="T54" style:family="text">
      <style:text-properties officeooo:rsid="005be9d7"/>
    </style:style>
    <style:style style:name="T55" style:family="text">
      <style:text-properties officeooo:rsid="005cee7e"/>
    </style:style>
    <style:style style:name="T56" style:family="text">
      <style:text-properties officeooo:rsid="0062a8bb"/>
    </style:style>
    <style:style style:name="T57" style:family="text">
      <style:text-properties officeooo:rsid="00657418"/>
    </style:style>
    <style:style style:name="T58" style:family="text">
      <style:text-properties officeooo:rsid="0066eaf6"/>
    </style:style>
    <style:style style:name="T59" style:family="text">
      <style:text-properties officeooo:rsid="00686e4b"/>
    </style:style>
    <style:style style:name="T60" style:family="text">
      <style:text-properties officeooo:rsid="00695b22"/>
    </style:style>
    <style:style style:name="T61" style:family="text">
      <style:text-properties officeooo:rsid="006a47c1"/>
    </style:style>
    <style:style style:name="T62" style:family="text">
      <style:text-properties officeooo:rsid="007317d7"/>
    </style:style>
    <style:style style:name="T63" style:family="text">
      <style:text-properties officeooo:rsid="0078ee4a"/>
    </style:style>
    <style:style style:name="T64" style:family="text">
      <style:text-properties fo:font-style="normal" style:text-underline-style="solid" style:text-underline-width="auto" style:text-underline-color="font-color" style:font-style-asian="normal" style:font-style-complex="normal"/>
    </style:style>
    <style:style style:name="T65" style:family="text">
      <style:text-properties officeooo:rsid="007b0fc6"/>
    </style:style>
    <style:style style:name="T66" style:family="text">
      <style:text-properties officeooo:rsid="007fb45f"/>
    </style:style>
    <style:style style:name="T67" style:family="text">
      <style:text-properties officeooo:rsid="00822af8"/>
    </style:style>
    <style:style style:name="T68" style:family="text">
      <style:text-properties officeooo:rsid="00833419"/>
    </style:style>
    <style:style style:name="T69" style:family="text">
      <style:text-properties officeooo:rsid="0085d04e"/>
    </style:style>
    <style:style style:name="T70" style:family="text">
      <style:text-properties officeooo:rsid="00873d6a"/>
    </style:style>
    <style:style style:name="T71" style:family="text">
      <style:text-properties officeooo:rsid="00873f56"/>
    </style:style>
    <style:style style:name="T72" style:family="text">
      <style:text-properties officeooo:rsid="00886e77"/>
    </style:style>
    <style:style style:name="T73" style:family="text">
      <style:text-properties officeooo:rsid="008a4a72"/>
    </style:style>
    <style:style style:name="T74" style:family="text">
      <style:text-properties officeooo:rsid="008ae9f4"/>
    </style:style>
    <style:style style:name="T75" style:family="text">
      <style:text-properties officeooo:rsid="008c6ded"/>
    </style:style>
    <style:style style:name="T76" style:family="text">
      <style:text-properties officeooo:rsid="008fb09a"/>
    </style:style>
    <style:style style:name="T77" style:family="text">
      <style:text-properties officeooo:rsid="0091bc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昼に-あなたが先手なら、ウーリーバック 1/1/1 動物 トークン1体を対象の対戦相手のコンパニオンの探検隊に生成する。その後、カードを1枚引く。</text:p>
      <text:p text:style-name="P1">昼に-あなたは[1]を支払うとともに、あなたの手札のカードを1枚リザーブに置いてもよい。そうしたなら、ブラスバグ 2/2/2 ロボット トークンを対象の探検隊に生成する。</text:p>
      <text:p text:style-name="P1">あなたの探検隊1つが森によって前進した時-カードを1枚引く。その後あなたの手札のカードを1枚リザーブに置く。</text:p>
      <text:p text:style-name="P1">[消耗]:あなたのコントロールするキャラクター1対を対象とする。6面ダイスを1個振る。</text:p>
      <text:p text:style-name="P1">・6+, それはアンカーを得る。（休息時、それはリザーブに送られず、代わりにアンカーを失う。）</text:p>
      <text:p text:style-name="P1">・2-5,それは1ブーストを得る。（ブーストは+1/+1/+1カウンターである。探検隊を離れるとき、ブーストはなくなる。）</text:p>
      <text:p text:style-name="P1">・1, それをリザーブに送る。</text:p>
      <text:p text:style-name="P1">[消耗]:お先にどうぞ。この能力はあなたが先手の時にのみ起動できる。（カードをプレイしたかのようにあなたのターンを終了する。あなたはまだカードをプレイできる。）</text:p>
      <text:p text:style-name="P1">昼に-あなたが先手なら、エアロリス トークンを1つあなたのランドマークに生成する。（それは「これが生け贄に捧げられたとき-リサプライする。」と「[消耗],[1]:これを生け贄に捧げる。」を持つパーマネントである。）（リサプライするには、あなたのデッキの一番上のカードをあなたのリザーブに置く。）</text:p>
      <text:p text:style-name="P1">あなたが各午後に最初にプレイしたキャラクターは1ブーストを得る。（ブーストは+1/+1/+1カウンターである。探検隊を離れるとき、ブーストはなくなる。）</text:p>
      <text:p text:style-name="P1">昼に-あなたが先手なら、ブーダ 2/2/2 コンパニオン トークン1体をあなたのコンパニオンの探検隊に生成する。</text:p>
      <text:p text:style-name="P1">昼に-オーディスの新兵 1/1/1 兵士 トークン1体をあなたのヒーローの探検隊に生成する。最初の日であるなら、この能力は無視する。</text:p>
      <text:p text:style-name="P1">[消耗],あなたのリザーブのカードを1枚捨て札にする:このターン、あなたが次にプレイする手札コストが[3]以下であるキャラクターは<text:span text:style-name="T1">アンカー</text:span> を得る。（休息時、それはリザーブに送られず、代わりにアンカーを失う。）</text:p>
      <text:p text:style-name="P1">あなたが官僚をプレイした時-それは<text:span text:style-name="T1">睡眠</text:span>を得る。（夕方、それのスタッツを無視する。休息時、それはリザーブに送られず、代わりに睡眠を失う。）</text:p>
      <text:p text:style-name="P1">私は英雄的カウンターを5個持ってゲームを開始する。</text:p>
      <text:p text:style-name="P1">あなたが私の英雄的カウンターの数以上の手札コストを持つキャラクターをプレイした時-カードを1枚引き、私は英雄的カウンターを1個得る。</text:p>
      <text:p text:style-name="P1">私は森、山、海の地形マーカーを1つずつ持ってゲームを開始する。</text:p>
      <text:p text:style-name="P1">昼に-あなたは私の地形マーカーのうち1つを、対象の見えている地域に置いてもよい。（その地域は、地形マーカーが置かれている限り、そのマーカーの地形のみを持ち、そのほかの地形を失う。）あなたが先にパスをした時-私は冒険カウンターを1個得る。その後、私が3つ以上の冒険カウンターを持っているなら、ハルア 2/2/2 リバイアサン コンパニオントークンをあなたのコンパニオンの探検隊に生成する。（それは、「あなたのヒーローが5個以上の冒険カウンターを持っているなら、私は巨大である。」を持つ。）（巨大であるなら、それはあなたの両方の探検隊に存在しているとみなす。）</text:p>
      <text:p text:style-name="P1">あなたがトークンであるキャラクターを生成した時-それは1ブーストを得る。（ブーストは+1/+1/+1カウンターである。探検隊を離れるとき、ブーストはなくなる。）</text:p>
      <text:p text:style-name="P2">あなたが8個よりも少ないマナ・オーブをコントロールしているなら、あなたがコントロールする<text:span text:style-name="T1">ブースト中</text:span>のトークンは防衛を持つ。（防衛を持つなら、その探検隊は夕方に前進できない。）</text:p>
      <text:p text:style-name="P2">昼に-あなたが先手なら、あなたのヒーローの探検隊は上昇する。（休息時まで、それは対戦相手の探検隊とその地域の地形で同点であったとしても前進できる。）</text:p>
      <text:p text:style-name="P1">あなたの上昇している探検隊1つ以上が前進した時-その探検隊に相対しているキャラクターがいないならば、カードを1枚引く。</text:p>
      <text:p text:style-name="P2">朝にカードを1枚しか引かない。その後、あなたの手札から1枚選ぶ代わりに、デッキの一番上のカードをマナ・ゾーンに置く。</text:p>
      <text:p text:style-name="P2">昼に-リサプライする。（あなたのデッキの一番上のカードをあなたのリザーブに置く。）</text:p>
      <text:p text:style-name="P1">熟練（私が探検隊を離れるとき、ブーストを失わない。）</text:p>
      <text:p text:style-name="P1"><text:span text:style-name="T1">一過</text:span>（私がリザーブに送られるなら、代わりに捨て札にする。）</text:p>
      <text:p text:style-name="P1">あなたのコントロールするすべてのキャラクターの探検隊を入れ替える。</text:p>
      <text:p text:style-name="P1">[表]あなたは、あなたのリザーブの呪文1つを捨て札にしてもよい。そうしたなら、私は1ブーストを得る。（ブーストは+1/+1/+1カウンターである。探検隊を離れるとき、ブーストはなくなる。）</text:p>
      <text:p text:style-name="P1">[表]私が海の探検隊に相対しているなら、サボタージュする。（リザーブのカード最大1枚を対象とし、それを捨て札にする。）</text:p>
      <text:p text:style-name="P2">巨大（私はあなたの両方の探検隊に存在しているとみなす。）</text:p>
      <text:p text:style-name="P2">タフ1（対戦相手が私を対象にするなら、[<text:span text:style-name="T15">1</text:span>]を追加で支払う。）</text:p>
      <text:p text:style-name="P1">夕方に-各キャラクターは一過を得る。（それがリザーブに送られるなら、代わりに捨て札にする。）</text:p>
      <text:p text:style-name="P47">[両面]あなたのコントロールする他のキャラクターそれぞれについて、それらの[両面]能力を起動してもよい。</text:p>
      <text:p text:style-name="P47"><text:span text:style-name="T1">一過</text:span>（私がリザーブに送られるなら、代わりに捨て札にする。）</text:p>
      <text:p text:style-name="P47">カードを1枚引く。各プレイヤーはそれぞれデッキの一番上のカードをマナ・ゾーンに置く。（それらは消耗したマナ・オーブである）</text:p>
      <text:p text:style-name="P15">[表]あなたはサボタージュするためにパーマネント1つを生け贄に捧げてもよい。（リザーブのカード最大1枚を対象とし、それを捨て札にする。）</text:p>
      <text:p text:style-name="P15">あなたがパーマネントを1つ生け贄に捧げた時-私がブーストされていないなら、私は1ブーストを得る。（ブーストは+1/+1/+1カウンターである。探検隊を離れるとき、ブーストはなくなる。）</text:p>
      <text:p text:style-name="P1"/>
      <text:p text:style-name="P1">[表]あなたのコントロールしているかあなたのリザーブにあるキャラクターのうちに合わせて9個以上の0である基本スタッツがあるなら、各プレイヤーはパスする。（パスしたらそれ以上カードをプレイできない。）</text:p>
      <text:p text:style-name="P1">[表]あなたはあなたの手札から呪文1つをリザーブに置いてもよい。そうしないなら、私を生け贄に捧げる。</text:p>
      <text:p text:style-name="P1">[表]あなたはロボットかパーマネント1つを生け贄に捧げてもよい。そうしたなら、私は2ブーストを得る。（ブーストは+1/+1/+1カウンターである。探検隊を離れるとき、ブーストはなくなる。）</text:p>
      <text:p text:style-name="P1">（ランドマーク。私が一過を得ることはない。）</text:p>
      <text:p text:style-name="P1">夕方に-私は士気カウンターを、あなたのコントロールしているキャラクターの数につき1個得る。</text:p>
      <text:p text:style-name="P1">[消耗],私の士気カウンターを6個支払う:対象の探検隊の各キャラクターはそれぞれ1ブーストを得る。（ブーストは+1/+1/+1カウンターである。探検隊を離れるとき、ブーストはなくなる。）</text:p>
      <text:p text:style-name="P1">[両面]消耗リサプライする。（あなたのデッキの一番上のカードをあなたのリザーブに置く。それを消耗する。それは消耗している限り、サポート能力を失い、プレイできない。）</text:p>
      <text:p text:style-name="P1">[ウラ]あなたは、あなたの手札の手札コストが[4]以上の呪文1つを公開してもよい。そうしたなら、カードを1枚引く。</text:p>
      <text:p text:style-name="P1">[両面]あなたは対象のキャラクターに<text:span text:style-name="T1">睡眠</text:span>を得させてもよい。それが私と相対しているなら、サボタージュする。（夕方、私のスタッツを無視する。休息時、それはリザーブに送られず、代わりに睡眠を失う。）（リザーブのカード最大1枚を対象とし、それを捨て札にする。）</text:p>
      <text:p text:style-name="P1">リサプライする。これによってあなたがキャラクターをリザーブに置いたなら、あなたは即座にそれを[2]減らしてプレイしてもよい。（あなたのデッキの一番上のカードをあなたのリザーブに置く。）</text:p>
      <text:p text:style-name="P1">（ランドマーク。私が一過を得ることはない。）</text:p>
      <text:p text:style-name="P1">[消耗]:このターン、あなたが次にプレイする呪文は無料である。</text:p>
      <text:p text:style-name="P1">（ランドマーク。私が一過を得ることはない。）</text:p>
      <text:p text:style-name="P1">[両面]私はケロンカウンターを3個得る。</text:p>
      <text:p text:style-name="P1">昼に-あなたは[1]を支払うとともに、私のケロンカウンターを1個支払ってもよい。そうしたなら、ブラスバグ 2/2/2 ロボット トークン1体を、対象の探検隊に生成する。</text:p>
      <text:p text:style-name="P1">あなたの各探検隊に、ブラスバグ 2/2/2 ロボット トークン1対を生成する。</text:p>
      <text:p text:style-name="P1">[表]サボタージュする。（リザーブのカード最大1枚を対象とし、それを捨て札にする。）</text:p>
      <text:p text:style-name="P69">一過<text:span text:style-name="T16">（私がリザーブに送られるなら、代わりに捨て札にする。）</text:span></text:p>
      <text:p text:style-name="P1">場またはリザーブにあるキャラクター2体を対象とし、それらのブーストを交換する。（ブーストは+1/+1/+1カウンターである。探検隊を離れるとき、ブーストはなくなる。）</text:p>
      <text:p text:style-name="P1">[両面]あなたが2つ以上植物をコントロールしているなら、私は2ブーストを得る。（ブーストは+1/+1/+1カウンターである。探検隊を離れるとき、ブーストはなくなる。）</text:p>
      <text:p text:style-name="P1">[ウラ]あなたが2体以上の<text:span text:style-name="T1">ブースト中</text:span>のキャラクターをコントロールしているなら、あなたがコントロールしている他の各植物はそれぞれ1ブーストを得る。（ブーストは+1/+1/+1カウンターである。探検隊を離れるとき、ブーストはなくなる。）</text:p>
      <text:p text:style-name="P1">私が探検隊を離れたとき-各プレイヤーはそれぞれデッキの一番上のカードをマナ・ゾーンに置く。（それらは消耗したマナ・オーブである）</text:p>
      <text:p text:style-name="P1">[表]あなたはあなたのリザーブから呪文1つをあなたの手札に戻してもよい。</text:p>
      <text:p text:style-name="P1">&lt;サポート&gt;[捨て札]:このターン、次にあなたがプレイする呪文のコストは[1]減る。</text:p>
      <text:p text:style-name="P1">対象のキャラクターは1ブーストを得て、<text:span text:style-name="T1">一過</text:span>を失う。</text:p>
      <text:p text:style-name="P10">[ウラ]あなたは即座にパスしてもよい。（パスしたらそれ以上カードをプレイできない）</text:p>
      <text:p text:style-name="P1">＜サポート＞[捨て札]:対象のキャラクターは<text:span text:style-name="T1">一過</text:span>を失う。</text:p>
      <text:p text:style-name="P45">夕方に私の探検隊が前進するなら、6面ダイスを1個振る。4以上なら、代わりに<text:span text:style-name="T15">1地域追加で前進する。</text:span></text:p>
      <text:p text:style-name="P1">対戦相手は[2]より少ないコストでキャラクターをプレイできない。</text:p>
      <text:p text:style-name="P1">私が森にいるなら、私は永遠である。（私は休息時にリザーブに送られない。）</text:p>
      <text:p text:style-name="P47"><text:span text:style-name="T1">一過</text:span>（私がリザーブに送られるなら、代わりに捨て札にする。）</text:p>
      <text:p text:style-name="P47">対象のあなたの探検隊を1地域後退させる。そうしたなら、あなたの他の探検隊を1地域前進させる。</text:p>
      <text:p text:style-name="P47"><text:span text:style-name="T1">一過</text:span><text:span text:style-name="T16">（私がリザーブに送られるなら、代わりに捨て札にする。）</text:span></text:p>
      <text:p text:style-name="P47">1つを選ぶ：</text:p>
      <text:p text:style-name="P47">・対象の<text:span text:style-name="T1">一過</text:span>、<text:span text:style-name="T1">アンカー</text:span>、または<text:span text:style-name="T1">睡眠</text:span>であるキャラクターを捨て札にする。</text:p>
      <text:p text:style-name="P1">・対象のパーマネントを捨て札にする。</text:p>
      <text:p text:style-name="P2">夜に-私が2つ以上のブーストを持っているなら、休息の後でサボタージュする。（ブーストは+1/+1/+1カウンターである。探検隊を離れるとき、ブーストはなくなる。）</text:p>
      <text:p text:style-name="P2">対象の手札コストが[3]以下であるキャラクターをリザーブに送る。</text:p>
      <text:p text:style-name="P1">（ランドマーク。私が一過を得ることはない。）</text:p>
      <text:p text:style-name="P1">私が生け贄に捧げられたとき-ブラスバグ 2/2/2 ロボット トークンを、あなたの各探検隊に生成する。</text:p>
      <text:p text:style-name="P1"/>
      <text:p text:style-name="P1"><text:span text:style-name="T1">一過</text:span>（私がリザーブに送られるなら、代わりに捨て札にする。）</text:p>
      <text:p text:style-name="P1">対象のキャラクターは2ブーストと<text:span text:style-name="T1">一過</text:span>を得る。（ブーストは+1/+1/+1カウンターである。探検隊を離れるとき、ブーストはなくなる。）</text:p>
      <text:p text:style-name="P1">[表]あなたはサボタージュするためにパーマネント1つを生け贄に捧げてもよい。（リザーブのカード最大1枚を対象とし、それを捨て札にする。）</text:p>
      <text:p text:style-name="P1">[両面]あなたは対象のキャラクターに<text:span text:style-name="T1">睡眠</text:span>を得させてもよい。（夕方、私のスタッツを無視する。休息時、それはリザーブに送られず、代わりに睡眠を失う。）</text:p>
      <text:p text:style-name="P1">[両面]私は<text:span text:style-name="T1">アンカー</text:span>を得る。（休息時、私はリザーブに送られず、代わりにアンカーを失う。）</text:p>
      <text:p text:style-name="P1">[両面]私は<text:span text:style-name="T1">一過</text:span>を得る。（私がリザーブに送られるなら、代わりに捨て札にする。）</text:p>
      <text:p text:style-name="P1">[表]サボタージュする。（リザーブのカード最大1枚を対象とし、それを捨て札にする。）</text:p>
      <text:p text:style-name="P1">[ウラ]あなたがこの午後にプレイする次のパーマネントのコストは[1]減る。</text:p>
      <text:p text:style-name="P1">私が<text:span text:style-name="T1">一過</text:span>を得るとき-私は1ブーストを得る。（ブーストは+1/+1/+1カウンターである。探検隊を離れるとき、ブーストはなくなる。）</text:p>
      <text:p text:style-name="P1">私は既に<text:span text:style-name="T1">一過</text:span>を持っていても、<text:span text:style-name="T1">一過</text:span>を得ることができる。</text:p>
      <text:p text:style-name="P1">[表]1体までの対象のキャラクターは<text:span text:style-name="T1">睡眠</text:span>を得る。あなたはそれに2ブーストを得させてもよい。（夕方、私のスタッツを無視する。休息時、それはリザーブに送られず、代わりに睡眠を失う。）（ブーストは+1/+1/+1カウンターである。探検隊を離れるとき、ブーストはなくなる。）</text:p>
      <text:p text:style-name="P1">[表]あなたは私に<text:span text:style-name="T1">一過</text:span>を得させてもよい。そうしたなら、他の対象のキャラクターは1ブーストを得る。（私がリザーブに送られるなら、代わりに捨て札にする。）（ブーストは+1/+1/+1カウンターである。探検隊を離れるとき、ブーストはなくなる。）</text:p>
      <text:p text:style-name="P1">（ランドマーク。私が一過を得ることはない。）</text:p>
      <text:p text:style-name="P1">あなたが呪文をプレイした時-私は秘儀カウンターを1個得る。その後、あなたは私を消耗して私の秘儀カウンター4つを支払ってもよい。そうしたならマナ・モス 2/2/2 イリュージョン トークン1体を対象の探検隊に生成する。</text:p>
      <text:p text:style-name="P1"><text:span text:style-name="T1">一過</text:span>（私がリザーブに送られるなら、代わりに捨て札にする。）</text:p>
      <text:p text:style-name="P1">あなたのデッキの一番上のカードをマナ・ゾーンに置く。（それらは消耗したマナ・オーブである）</text:p>
      <text:p text:style-name="P1">昼に-あなたはリザーブの対象のカードを消耗してよい。（それは消耗している限り、サポート能力を失い、プレイできない。）</text:p>
      <text:p text:style-name="P1">（ランドマーク。私が一過を得ることはない。）</text:p>
      <text:p text:style-name="P1">[両面]あなたは対象の手札コスト[2]以下のキャラクターをリザーブに送ってもよい。</text:p>
      <text:p text:style-name="P1">私が生け贄に捧げられたとき-リサプライする。（あなたのデッキの一番上のカードをあなたのリザーブに置く。）</text:p>
      <text:p text:style-name="P1">[消耗],[1]:私を生け贄に捧げる。</text:p>
      <text:p text:style-name="P1">（ランドマーク。私が一過を得ることはない。）</text:p>
      <text:p text:style-name="P1">あなたが最初にパスした時-対象のキャラクターは1ブーストを得る。その後対象のプレイヤーのランドマークにエアロリス トークンを1個生成する。（それは「これが生け贄に捧げられたとき-リサプライする。」と「[消耗],[1]:これを生け贄に捧げる。」を持つパーマネントである。）</text:p>
      <text:p text:style-name="P1"><text:span text:style-name="T1">一過</text:span>（私がリザーブに送られるなら、代わりに捨て札にする。）</text:p>
      <text:p text:style-name="P1">対象の探検隊に、オーディスの新兵 1/1/1 兵士 トークンをX体生成する。Xは対象のプレイヤーのリザーブのカードの枚数に等しい。</text:p>
      <text:p text:style-name="P1"><text:span text:style-name="T1">一過</text:span>（私がリザーブに送られるなら、代わりに捨て札にする。）</text:p>
      <text:p text:style-name="P1">あなたは私を[1]少なく唱えてよい。そうしたなら、私は海にいるキャラクタ―しか対象にできない。</text:p>
      <text:p text:style-name="P1">対象のキャラクターを持ち主のデッキの一番上に置く。</text:p>
      <text:p text:style-name="P1"><text:span text:style-name="T1">一過</text:span>（私がリザーブに送られるなら、代わりに捨て札にする。）</text:p>
      <text:p text:style-name="P1">2つ選ぶ：</text:p>
      <text:p text:style-name="P1">・3つの探検隊を対象とし、それらにウーリーバック 1/1/1 動物 トークンをそれぞれ1体生成する。</text:p>
      <text:p text:style-name="P1">・対象の手札コスト[3]以下のキャラクターはアンカーを得る。</text:p>
      <text:p text:style-name="P47">・森の地形マーカーを対象の見えている地域の上に置く。（その地域は、地形マーカーが置かれている限り、そのマーカーの地形のみを持ち、そのほかの地形を失う。）</text:p>
      <text:p text:style-name="P47">対象のキャラクターは<text:span text:style-name="T1">一過</text:span>を得る。（それがリザーブに送られるなら、代わりに捨て札にする。）</text:p>
      <text:p text:style-name="P47"><text:soft-page-break/>対戦相手1人が1枚以上のカードを引いたりリサプライした時-私は1ブーストを得る。（ブーストは+1/+1/+1カウンターである。探検隊を離れるとき、ブーストはなくなる。）</text:p>
      <text:p text:style-name="P1">私がどこからでもリザーブに置かれたとき-私を消耗する。（それは消耗している限り、サポート能力を失い、プレイできない。）</text:p>
      <text:p text:style-name="P1">[表]私をリザーブに送る。</text:p>
      <text:p text:style-name="P2"><text:span text:style-name="T1">一過</text:span>（私がリザーブに送られるなら、代わりに捨て札にする。）</text:p>
      <text:p text:style-name="P1">キャラクター1体を生け贄に捧げる。そうしたなら、対象のキャラクターかパーマネントを捨て札にする。</text:p>
      <text:p text:style-name="P1">（ランドマーク。私が一過を得ることはない。）</text:p>
      <text:p text:style-name="P1">夕に-私は士気カウンターを、あなたのコントロールしているキャラクターの数につき1個得る。</text:p>
      <text:p text:style-name="P1">[消耗],私の士気カウンターを6個支払う:あなたのコントロールする各キャラクターはそれぞれ1ブーストを得る。</text:p>
      <text:p text:style-name="P2">[ウラ]対象のキャラクターを捨て札にしてもよい。そうしたなら、そのプレイヤーのコントローラーのランドマークに、エアロリス トークンを1つ生成する。（それは「これが生け贄に捧げられたとき-リサプライする。」と「[消耗],[1]:これを生け贄に捧げる。」を持つパーマネントである。）</text:p>
      <text:p text:style-name="P2">＜サポート＞[捨て札]:対象のプレイヤーのランドマークに、エアロリス トークンを1つ生成する。（それは「これが生け贄に捧げられたとき-リサプライする。」と「[消耗],[1]:これを生け贄に捧げる。」を持つパーマネントである。）</text:p>
      <text:p text:style-name="P1">[表]あなたは対象のキャラクターをリザーブに送ってもよい。</text:p>
      <text:p text:style-name="P1">[両面]あなたの他の探検隊に、オーディスの新兵 1/1/1 兵士 トークンを1体生成する。</text:p>
      <text:p text:style-name="P1">[両面]あなたが他のキャラクターを3体以上コントロールしているなら、リサプライする。（あなたのデッキの一番上のカードをあなたのリザーブに置く。）</text:p>
      <text:p text:style-name="P1">[表]場（探検隊とランドマーク）やリザーブにある他のすべてのカード（トークンを含む）を捨て札にする。</text:p>
      <text:p text:style-name="P1">カード1枚が捨て山に置かれた時-私は1ブーストを得る。（トークンが捨て山に置かれることはない。）</text:p>
      <text:p text:style-name="P1">＜サポート＞[捨て札]:リザーブの対象のカード1枚を消耗する。（それは消耗している限り、サポート能力を失い、プレイできない。）</text:p>
      <text:p text:style-name="P1">[ウラ]あなたが2体以上の<text:span text:style-name="T1">ブースト中</text:span>のキャラクターをコントロールしているなら、最大1体の対象のキャラクターは<text:span text:style-name="T1">睡眠</text:span>を得る。あなたはそれに2ブーストを得させてもよい。（夕方、私のスタッツを無視する。休息時、それはリザーブに送られず、代わりに睡眠を失う。）</text:p>
      <text:p text:style-name="P1">私が<text:span text:style-name="T1">ブースト中</text:span>なら、他のキャラクターをリザーブからプレイするコストは[1]を最小として[1]減る。</text:p>
      <text:p text:style-name="P1">＜サポート＞<text:span text:style-name="T15">[</text:span>無限<text:span text:style-name="T15">]あなたが他の0である基本スタッツを持つキャラクターをプレイした時-私は2ブーストを最大として1ブーストを得る。</text:span></text:p>
      <text:p text:style-name="P1">対象のキャラクターは3ブーストを得る。（ブーストは+1/+1/+1カウンターである。探検隊を離れるとき、ブーストはなくなる。）</text:p>
      <text:p text:style-name="P1">私が2体以上のキャラクターと相対していない限り、私は防衛を持つ。（私の探検隊は夕方に前進できない。）</text:p>
      <text:p text:style-name="P1">3つ以上の、1つの地形である地域が見えているなら、対象のキャラクターは4ブーストを得る。そうでないなら、それは2ブーストを得る。（ブーストは+1/+1/+1カウンターである。探検隊を離れるとき、ブーストはなくなる。）</text:p>
      <text:p text:style-name="P1">[両面]あなたは私が1ブーストを得るためにラッシュしてもよい。（ラッシュするには、他のカード1枚をすぐにプレイする。）（ブーストは+1/+1/+1カウンターである。探検隊を離れるとき、ブーストはなくなる。）</text:p>
      <text:p text:style-name="P1">[表]私は2ブーストを得る。（ブーストは+1/+1/+1カウンターである。探検隊を離れるとき、ブーストはなくなる。）</text:p>
      <text:p text:style-name="P3">[表]私に相対しているあなたの対戦相手の探検隊は、1地域後退する。</text:p>
      <text:p text:style-name="P1">＜サポート＞<text:span text:style-name="T15">[捨て札]:カードを1枚引く。</text:span></text:p>
      <text:p text:style-name="P3">[表]私に相対しているあなたの対戦相手の探検隊は、1地域後退する。</text:p>
      <text:p text:style-name="P3">[両面]この午後に次にあなたがプレイするパーマネントのコストは[3]減る。</text:p>
      <text:p text:style-name="P3">1つを選ぶ：</text:p>
      <text:p text:style-name="P3">・最大2体の対象のキャラクターは<text:span text:style-name="T1">一過</text:span>を得る。（私がリザーブに送られるなら、代わりに捨て札にする。）</text:p>
      <text:p text:style-name="P3">・カードを1枚引く。6面ダイスを振る。4+なら、リサプライする。（あなたのデッキの一番上のカードをあなたのリザーブに置く。）</text:p>
      <text:p text:style-name="P3">・対象のキャラクターはあなたのリザーブのカード1枚につき1ブーストを得る。（ブーストは+1/+1/+1カウンターである。探検隊を離れるとき、ブーストはなくなる。）</text:p>
      <text:p text:style-name="P3">[ウラ]あなたはあなたの手札の手札コスト[4]以上のキャラクターカードを1枚公開してもよい。そうしたなら、カードを1枚引く。</text:p>
      <text:p text:style-name="P3"><text:span text:style-name="T1">一過</text:span>（私がリザーブに送られるなら、代わりに捨て札にする。）</text:p>
      <text:p text:style-name="P3">対象の探検隊は、今日は前進することができない。</text:p>
      <text:p text:style-name="P8">[両面]:私は<text:span text:style-name="T1">アンカー</text:span>を得る。（休息時、私はリザーブに送られず、代わりにアンカーを失う。）</text:p>
      <text:p text:style-name="P8"/>
      <text:p text:style-name="P3">（ランドマーク。私が一過を得ることはない。）</text:p>
      <text:p text:style-name="P3">[消耗]:このターン、次にあなたが森にプレイするキャラクターは1ブーストを得る。（ブーストは+1/+1/+1カウンターである。探検隊を離れるとき、ブーストはなくなる。）</text:p>
      <text:p text:style-name="P3"><text:span text:style-name="T1">一過</text:span>（私がリザーブに送られるなら、代わりに捨て札にする。）</text:p>
      <text:p text:style-name="P3">即座に[5]コスト減らしてキャラクターを1体プレイする。</text:p>
      <text:p text:style-name="P3">あなたが呪文をプレイするたび-私は1ブーストを得る。（ブーストは+1/+1/+1カウンターである。探検隊を離れるとき、ブーストはなくなる。）</text:p>
      <text:p text:style-name="P3">[表]あなたは[1]を支払ってもよい。そうしたなら、最大1体の対象のキャラクターは<text:span text:style-name="T1">睡眠</text:span>を得る。（夕方、私のスタッツを無視する。休息時、それはリザーブに送られず、代わりに睡眠を失う。）</text:p>
      <text:p text:style-name="P3">私が探検隊を離れたとき、もし私が<text:span text:style-name="T1">一過</text:span>であるなら-あなたはあなたのリザーブから呪文1つをあなたの手札に戻してもよい。</text:p>
      <text:p text:style-name="P3">[両面]最大2体の対象のキャラクターはそれぞれ1ブーストを得る。（ブーストは+1/+1/+1カウンターである。探検隊を離れるとき、ブーストはなくなる。）</text:p>
      <text:p text:style-name="P3">[両面]リザーブの対象のカード1枚を消耗する。（それは消耗している限り、サポート能力を失い、プレイできない。）</text:p>
      <text:p text:style-name="P3">（私を探検隊にプレイする。私の探検隊が前進したなら、休息時に私をリザーブに送る。）</text:p>
      <text:p text:style-name="P3">私の探検隊が前進するなら、前進する代わりに私を捨て札にしてもよい。そうしたなら、あなたのデッキの上から4枚のカードを見て、1枚を手札に加え、残りを捨て札にする。</text:p>
      <text:p text:style-name="P3">[ウラ]あなたは[1]を支払ってもよい。そうしたなら、対象の他のキャラクターは<text:span text:style-name="T1">一過</text:span>か<text:span text:style-name="T1">アンカー</text:span>か<text:span text:style-name="T1">睡眠</text:span>を得る。（休息時、私はリザーブに送られず、代わりにアンカーを失う。）（夕方、私のスタッツを無視する。休息時、それはリザーブに送られず、代わりに睡眠を失う。）</text:p>
      <text:p text:style-name="P3">昼に-リサプライ（あなたのデッキの一番上のカードをあなたのリザーブに置く。）</text:p>
      <text:p text:style-name="P3">あなたは消耗しているカードをあなたのリザーブからプレイできる。</text:p>
      <text:p text:style-name="P2">（ランドマーク。私が一過を得ることはない。）</text:p>
      <text:p text:style-name="P2">[両面]あなたは対象の手札コスト[2]以下のキャラクターをリザーブに送ってもよい。</text:p>
      <text:p text:style-name="P2">私が生け贄に捧げられたとき-リサプライする。（あなたのデッキの一番上のカードをあなたのリザーブに置く。）</text:p>
      <text:p text:style-name="P2">[消耗],[1]:私を生け贄に捧げる。</text:p>
      <text:p text:style-name="P2">＜サポート＞<text:span text:style-name="T15">[捨て札]:このターン、次にあなたがプレイするキャラクターは</text:span><text:span text:style-name="T2">一過</text:span><text:span text:style-name="T15">を失う。</text:span></text:p>
      <text:p text:style-name="P2">私が探検隊を離れたとき、もし私が<text:span text:style-name="T1">一過</text:span>であったなら-カードを1枚引く。</text:p>
      <text:p text:style-name="P2">＜サポート＞<text:span text:style-name="T15">[無限]昼に-1つを選ぶ:</text:span></text:p>
      <text:p text:style-name="P2">・私は3ブーストを最大として1ブーストを得る。</text:p>
      <text:p text:style-name="P2">・<text:span text:style-name="T15">[消耗]:私は3ブーストを最大として2ブーストを得る。</text:span></text:p>
      <text:p text:style-name="P3">[ウラ]あなたはリザーブの対象のカード1枚を消耗してもよい。（それは消耗している限り、サポート能力を失い、プレイできない。）</text:p>
      <text:p text:style-name="P3">[両面]各プレイヤーはカードを1枚引くために手札のカードを1枚リザーブに置いてもよい。</text:p>
      <text:p text:style-name="P3">巨大（私はあなたの両方の探検隊に存在しているとみなす。）</text:p>
      <text:p text:style-name="P3">私は場にある時でもない時でも、呪文であるともみなす。</text:p>
      <text:p text:style-name="P3">あなたのマナ・オーブが7つ未満であるなら、私はプレイできない。</text:p>
      <text:p text:style-name="P3">[両面]私の探検隊のキャラクター1体を生け贄に捧げる。</text:p>
      <text:p text:style-name="P3">（ランドマーク。私が一過を得ることはない。）</text:p>
      <text:p text:style-name="P3">カードが1枚あなたの手札やデッキからリザーブに置かれるたび-私は試練カウンターを1個得る。</text:p>
      <text:p text:style-name="P3">私が私の3つ目の試練カウンターを得たとき-私を生け贄に捧げる。そうしたなら、ドラゴンの影 5/5/5 イリュージョン トークンを対象の探検隊に生成し、あなたのリザーブの全てのカードを非消耗にする。</text:p>
      <text:p text:style-name="P3">[両面]私は一過を得る。（私がリザーブに送られるなら、代わりに捨て札にする。）</text:p>
      <text:p text:style-name="P3">[両面]私は対象の対戦相手がコントロールするキャラクター1体につき、1ブーストを得る。（ブーストは+1/+1/+1カウンターである。探検隊を離れるとき、ブーストはなくなる。）</text:p>
      <text:p text:style-name="P3">（ランドマーク。私が一過を得ることはない。）</text:p>
      <text:p text:style-name="P3">あなたがリザーブのカードを消耗するたび-あなたはマナ・モス 2/2/2 イリュージョン トークンを対象の探検隊に生成するために私を消耗してもよい。</text:p>
      <text:p text:style-name="P3">＜サポート＞[無限]他のキャラクターが1体あなたの探検隊に加わるたび-私は2ブーストを最大として1ブーストを得る。</text:p>
      <text:p text:style-name="P8">（ランドマーク。私が一過を得ることはない。）</text:p>
      <text:p text:style-name="P8">[消耗]:対象の探検隊は上昇する。（休息時まで、それは対戦相手の探検隊とその地域の地形で同点であったとしても前進できる。）</text:p>
      <text:p text:style-name="P3">スカウト[3]（あなたは私を手札から[3]でプレイしてもよい。そうしたなら「[表]私をリザーブに送る。」を持つ。）</text:p>
      <text:p text:style-name="P3">[両面]対象のキャラクターを持ち主の手札に戻す。</text:p>
      <text:p text:style-name="P3">[ウラ]私は2ブーストを得る。（ブーストは+1/+1/+1カウンターである。探検隊を離れるとき、ブーストはなくなる。）</text:p>
      <text:p text:style-name="P3">[表]あなたが4体以上のキャラクターをコントロールしているなら、オーディスの新兵 1/1/1 兵士 トークンをあなたの各探検隊に生成する。</text:p>
      <text:p text:style-name="P3">＜サポート＞[捨て札]:あなたのコンパニオンの探検隊にオーディスの新兵 1/1/1 兵士 トークンを1体生成する。</text:p>
      <text:p text:style-name="P3">スカウト[1]（あなたは私を手札から[1]でプレイしてもよい。そうしたなら「[表]私をリザーブに送る。」を持つ。）</text:p>
      <text:p text:style-name="P3">[両面]あなたのリザーブの全てのカードを非消耗にする。</text:p>
      <text:p text:style-name="P3">防衛（私の探検隊は夕方に前進できない。）</text:p>
      <text:p text:style-name="P3">私の探検隊が（相対する探検隊より）遅れているなら、防衛を持つキャラクターは私の探検隊の前進を妨げない。</text:p>
      <text:p text:style-name="P3">（私を探検隊にプレイする。私の探検隊が前進したなら、休息時に私をリザーブに送る。）</text:p>
      <text:p text:style-name="P3">[両面]オーディスの新兵 1/1/1 兵士 トークンを1体私の探検隊に生成する。</text:p>
      <text:p text:style-name="P3">[ウラ]私が2つ以上のブーストを持っているなら、カードを1枚引く。</text:p>
      <text:p text:style-name="P3">＜サポート＞[無限]あなたが他のキャラクターをプレイした時-私は3ブーストを最大として1ブーストを得る。</text:p>
      <text:p text:style-name="P3">下記をX+1回行う。Xは私の秘儀カウンターの数に等しい。</text:p>
      <text:p text:style-name="P3">・対象の手札コストが2以下のキャラクター1体をリザーブに送り、消耗する。（それは消耗している限り、サポート能力を失い、プレイできない。）</text:p>
      <text:p text:style-name="P3">＜サポート＞[無限]あなたが他の呪文をプレイした時-私は3個を最大として秘儀カウンターを1個得る。</text:p>
      <text:p text:style-name="P4">[ウラ]あなたは即座にパスしてもよい。そうしたなら、私は1ブーストを得る。（パスしたらそれ以上カードをプレイできない）（ブーストは+1/+1/+1カウンターである。探検隊を離れるとき、ブーストはなくなる。）</text:p>
      <text:p text:style-name="P10"><text:span text:style-name="T1">一過</text:span>（私がリザーブに送られるなら、代わりに捨て札にする。）</text:p>
      <text:p text:style-name="P10">2つ選ぶ：</text:p>
      <text:p text:style-name="P10">・3つの探検隊を対象とし、それらにウーリーバック 1/1/1 動物 トークンをそれぞれ1体生成する。</text:p>
      <text:p text:style-name="P10">・対象の手札コスト[3]以下のキャラクターはアンカーを得る。</text:p>
      <text:p text:style-name="P10">・森の地形マーカーを対象の見えている地域の上に置く。（その地域は、地形マーカーが置かれている限り、そのマーカーの地形のみを持ち、そのほかの地形を失う。）</text:p>
      <text:p text:style-name="P11">[両面]あなたがコントロールしているキャラクターのうちに、0である基本スタッツが合わせて3つ以上あるなら、私は1ブーストを得る。（ブーストは+1/+1/+1カウンターである。探検隊を離れるとき、ブーストはなくなる。）</text:p>
      <text:p text:style-name="P11">[表]あなたはパーマネントを1つ生け贄に捧げてもよい。そうしないなら、私は<text:span text:style-name="T1">一過</text:span>を得る。（私がリザーブに送られるなら、代わりに捨て札にする。）</text:p>
      <text:p text:style-name="P10">＜サポート＞<text:span text:style-name="T15">[</text:span>無限<text:span text:style-name="T15">]あなたが他の0である基本スタッツを持つキャラクターをプレイした時-私は2ブーストを最大として1ブーストを得る。</text:span></text:p>
      <text:p text:style-name="P10">（私を探検隊にプレイする。私の探検隊が前進したなら、休息時に私をリザーブに送る。）</text:p>
      <text:p text:style-name="P11">[両面]私は<text:span text:style-name="T1">一過</text:span>を得る。（私がリザーブに送られるなら、代わりに捨て札にする。）</text:p>
      <text:p text:style-name="P11">私の探検隊のキャラクターが1体だけであるなら、それは巨大である。（私はあなたの両方の探検隊に存在しているとみなす。）</text:p>
      <text:p text:style-name="P11">[表]カードを1枚引く。<text:span text:style-name="T17"/></text:p>
      <text:p text:style-name="P4">＜サポート＞[無限]あなたが呪文をプレイした時-私は<text:span text:style-name="T18">2ブースト</text:span>を最大として1ブーストを得る。</text:p>
      <text:p text:style-name="P4">[両面]リザーブの対象のカード1枚を消耗する。（それは消耗している限り、サポート能力を失い、プレイできない。）</text:p>
      <text:p text:style-name="P4">対象のキャラクターは探検隊を入れ替える。</text:p>
      <text:p text:style-name="P4">＜サポート＞<text:span text:style-name="T18">[捨て札]:このターン、次にあなたがプレイするカードのコストは[1]減る。</text:span></text:p>
      <text:p text:style-name="P4">＜サポート＞<text:span text:style-name="T18">[捨て札]:このターン、次にあなたがプレイするカードのコストは[1]減る。</text:span></text:p>
      <text:p text:style-name="P4">私があなたの手札からリザーブに置かれたとき-あなたは私を無料でプレイしてもよい。そうしたなら私は<text:span text:style-name="T1">睡眠</text:span>を得る。（夕方、私のスタッツを無視する。休息時、それはリザーブに送られず、代わりに睡眠を失う。）</text:p>
      <text:p text:style-name="P5"><text:span text:style-name="T19">[</text:span>両面<text:span text:style-name="T19">]あなたは</text:span>即座に[<text:span text:style-name="T19">3</text:span>]コスト減らしてキャラクターを1体プレイしてもよい。それは<text:span text:style-name="T19">2ブーストを得る。（ブーストは+1/+1/+1カウンターである。探検隊を離れるとき、ブーストはなくなる。）</text:span></text:p>
      <text:p text:style-name="P5">リサプライ（あなたのデッキの一番上のカードをあなたのリザーブに置く。）</text:p>
      <text:p text:style-name="P5">熟練（私が探検隊を離れるとき、ブーストを失わない。）</text:p>
      <text:p text:style-name="P13">[表]私が1ブーストを得るためにあなたは[2]を支払ってもよい。（ブーストは+1/+1/+1カウンターである。探検隊を離れるとき、ブーストはなくなる。）</text:p>
      <text:p text:style-name="P13">[表]各プレイヤーは自分の手札を捨てて、カードを3枚引く。</text:p>
      <text:p text:style-name="P5">[ウラ]リザーブの対象のカード1枚を消耗する。（それは消耗している限り、サポート能力を失い、プレイできない。）</text:p>
      <text:p text:style-name="P5"><text:span text:style-name="T19">[表]</text:span>私が森の探検隊と相対しているなら、あなたは対象のキャラクターに<text:span text:style-name="T1">一過</text:span>を得させてもよい。（私がリザーブに送られるなら、代わりに捨て札にする。）</text:p>
      <text:p text:style-name="P14">私がどこからでもリザーブに置かれたとき-私を消耗する。（それは消耗している限り、サポート能力を失い、プレイできない。）</text:p>
      <text:p text:style-name="P14"><text:soft-page-break/>[表]私をリザーブに送る。</text:p>
      <text:p text:style-name="P29">対戦相手は[2]より少ないコストでキャラクターをプレイできない。（それより少ない<text:span text:style-name="T22">コストのカードをプレイするには、代わりに[2]を支払う必要がある。）</text:span></text:p>
      <text:p text:style-name="P13">[両面]6面ダイスを振る。4+なら、対象の手札コストが[3]以下であるキャラクター1体をリザーブに送ってもよい。</text:p>
      <text:p text:style-name="P16">巨大（私はあなたの両方の探検隊に存在しているとみなす。）</text:p>
      <text:p text:style-name="P16">[両面]あなたはあなたのリザーブのカードを望む枚数捨て札にして、その1枚につき私に1ブーストを得させてもよい。（ブーストは+1/+1/+1カウンターである。探検隊を離れるとき、ブーストはなくなる。）</text:p>
      <text:p text:style-name="P19">[両面]私の探検隊が<text:span text:style-name="T15">（相対する探検隊より）</text:span>遅れているなら、私は1ブーストを得る。（ブーストは+1/+1/+1カウンターである。探検隊を離れるとき、ブーストはなくなる。）</text:p>
      <text:p text:style-name="P16">防衛（私の探検隊は夕方に前進できない。）</text:p>
      <text:p text:style-name="P16">私が探検隊を離れたとき-マナ・モス 2/2/2 イリュージョン トークンを1体私の探検隊に生成する。</text:p>
      <text:p text:style-name="P16">&lt;サポート&gt;[捨て札]:<text:span text:style-name="T15">あなたはリザーブの対象のカード1枚を消耗してもよい。（それは消耗している限り、サポート能力を失い、プレイできない。）</text:span></text:p>
      <text:p text:style-name="P16">（ランドマーク。私が一過を得ることはない。）</text:p>
      <text:p text:style-name="P16">[両面]リサプライする。（あなたのデッキの一番上のカードをあなたのリザーブに置く。）</text:p>
      <text:p text:style-name="P16">あなたのリザーブ上限は1増える。</text:p>
      <text:p text:style-name="P30">[両面]あなたが先手でないなら、サボタージュする。そうでないなら、リザーブの対象のカード1枚を消耗する。（リザーブのカード最大1枚を対象とし、それを捨て札にする。）（それは消耗している限り、サポート能力を失い、プレイできない。）</text:p>
      <text:p text:style-name="P30">[表]あなたのリザーブにリザーブコストが[4]以上である呪文があるなら、あなたは対象の手札コストが[2]以下のキャラクター1体をリザーブに送ってもよい。</text:p>
      <text:p text:style-name="P30">&lt;サポート&gt;[捨て札]:エアロリス トークン1個をあなたのランドマークに生成する。（それは「これが生け贄に捧げられたとき-リサプライする。」と「[消耗],[1]:これを生け贄に捧げる。」を持つパーマネントである。）</text:p>
      <text:p text:style-name="P16">[両面]他のロボットかパーマネントを1つ生け贄に捧げる。そうしないなら、私を生け贄に捧げる。</text:p>
      <text:p text:style-name="P16">（私を探検隊にプレイする。私の探検隊が前進したなら、休息時に私をリザーブに送る。）</text:p>
      <text:p text:style-name="P16">私の探検隊が前進する時-私の探検隊の対象のキャラクターは<text:span text:style-name="T1">一過</text:span>を失う。</text:p>
      <text:p text:style-name="P22">対象の手札コストが[3]以下であるキャラクターをリザーブに送る。</text:p>
      <text:p text:style-name="P23">私の探検隊が森によって前進した時-あなたはカードを1枚引くために私を生け贄に捧げてもよい。</text:p>
      <text:p text:style-name="P23">あなたが呪文をプレイするコストは、その基本コストが<text:span text:style-name="T20">[4]以上であるなら、[1]減る。（リザーブからプレイするならリザーブコスト、そうでないなら手札コストである。）</text:span></text:p>
      <text:p text:style-name="P17">巨大（私はあなたの両方の探検隊に存在しているとみなす。）</text:p>
      <text:p text:style-name="P17">[両面]あなたはあなたのリザーブのカードを望む枚数捨て札にして、その1枚につき私に1ブーストを得させてもよい。（ブーストは+1/+1/+1カウンターである。探検隊を離れるとき、ブーストはなくなる。）</text:p>
      <text:p text:style-name="P17">（ランドマーク。私が一過を得ることはない。）</text:p>
      <text:p text:style-name="P17">あなたがキャラクターを森にプレイした時-私は試練カウンターを1個得る。</text:p>
      <text:p text:style-name="P17">私が私の3個目の試練カウンターを得たとき-私を生け贄に捧げる。ドラゴンの影 5/5/5 イリュージョン トークン<text:span text:style-name="T20">1体を</text:span>対象の探検隊に生成する。それは<text:span text:style-name="T1">アンカー</text:span>を得る。（休息時、私はリザーブに送られず、代わりにアンカーを失う。）</text:p>
      <text:p text:style-name="P17">＜サポート＞<text:span text:style-name="T20">[無限]あなたが他のキャラクターをプレイした時-あなたはそれに1ブーストを得させるために[1]を支払ってもよい。（ブーストは+1/+1/+1カウンターである。探検隊を離れるとき、ブーストはなくなる。）</text:span></text:p>
      <text:p text:style-name="P17"><text:span text:style-name="T1">一過</text:span>（私がリザーブに送られるなら、代わりに捨て札にする。）</text:p>
      <text:p text:style-name="P17">いずれかのリザーブにある、対象のリザーブコストが<text:span text:style-name="T20">[2]以下のキャラクター1つを選ぶ。それを無料でプレイする。（それをあなたの探検隊のうちの1つに出す。）</text:span></text:p>
      <text:p text:style-name="P17">＜サポート＞<text:span text:style-name="T20">[捨て札]:対象の手札コストが[3]以下であるキャラクター1体は</text:span><text:span text:style-name="T3">アンカー</text:span><text:span text:style-name="T20">を得る。（休息時、私はリザーブに送られず、代わりにアンカーを失う。）</text:span></text:p>
      <text:p text:style-name="P17"><text:span text:style-name="T1">一過</text:span>（私がリザーブに送られるなら、代わりに捨て札にする。）</text:p>
      <text:p text:style-name="P24">6面ダイスを1個振る。対象のキャラクターをその持ち主のデッキの上からX番目に置く。Xはその出目に等しい。</text:p>
      <text:p text:style-name="P28"><text:span text:style-name="T1">一過</text:span>（私がリザーブに送られるなら、代わりに捨て札にする。）</text:p>
      <text:p text:style-name="P28">対象のキャラクターを捨て札にし、その後それの探検隊にマナ・モス 2/2/2 イリュージョン トークン1体を生成する。</text:p>
      <text:p text:style-name="P24"/>
      <text:p text:style-name="P24"><text:span text:style-name="T1">一過</text:span>（私がリザーブに送られるなら、代わりに捨て札にする。）</text:p>
      <text:p text:style-name="P25">1つを選ぶ。:</text:p>
      <text:p text:style-name="P25">・対象のキャラクターをリザーブに送る。それが森にいなかったなら、それのコントローラーはカードを1枚引く。</text:p>
      <text:p text:style-name="P25">・対象のパーマネントを捨て札にする。</text:p>
      <text:p text:style-name="P25">スカウト[2]（あなたは私を手札から[2]でプレイしてもよい。そうしたなら「[表]私をリザーブに送る。」を持つ。）</text:p>
      <text:p text:style-name="P25">[表]マナ・モス 2/2/2 イリュージョン トークン1体を対象の探検隊に生成する。</text:p>
      <text:p text:style-name="P19">[両面]私の探検隊が<text:span text:style-name="T15">（相対する探検隊より）</text:span>遅れているなら、私は1ブーストを得る。（ブーストは+1/+1/+1カウンターである。探検隊を離れるとき、ブーストはなくなる。）</text:p>
      <text:p text:style-name="P18">＜サポート＞<text:span text:style-name="T21">[捨て札]:リサプライする。（あなたのデッキの一番上のカードをあなたのリザーブに置く。）</text:span></text:p>
      <text:p text:style-name="P26">私の探検隊が森によって前進した時-あなたは私を持ち主のマナ・ゾーンに置いてもよい。（それらは消耗したマナ・オーブである）</text:p>
      <text:p text:style-name="P26"><text:span text:style-name="T1">一過</text:span>（私がリザーブに送られるなら、代わりに捨て札にする。）</text:p>
      <text:p text:style-name="P26">対象のキャラクターかパーマネントを、持ち主のマナ・ゾーンに置く。（それらは消耗したマナ・オーブである）</text:p>
      <text:p text:style-name="P27"><text:span text:style-name="T1">一過</text:span>（私がリザーブに送られるなら、代わりに捨て札にする。）</text:p>
      <text:p text:style-name="P27">あなたは私のコストを[2]減らすためにあなたのリザーブのカード1枚を捨て札にしてもよい。</text:p>
      <text:p text:style-name="P27">対象のキャラクターかパーマネントを持ち主のデッキの一番上に戻す。</text:p>
      <text:p text:style-name="P27">1つを選ぶ:</text:p>
      <text:p text:style-name="P27">・対象のキャラクターは3ブーストを得る。</text:p>
      <text:p text:style-name="P27">・対象の手札コスト[3]以下のキャラクターを持ち主の手札に戻す。</text:p>
      <text:p text:style-name="P27">・あなたのデッキの一番上のカードをマナ・ゾーンに置く。（それらは消耗したマナ・オーブである）</text:p>
      <text:p text:style-name="P27">熟練（私が探検隊を離れるとき、ブーストを失わない。）</text:p>
      <text:p text:style-name="P27">[両面]私は1ブーストを得る。（ブーストは+1/+1/+1カウンターである。探検隊を離れるとき、ブーストはなくなる。）</text:p>
      <text:p text:style-name="P27">[ウラ]私がブーストを4つ以上持っているなら、私は<text:span text:style-name="T1">一過</text:span>を失う。</text:p>
      <text:p text:style-name="P29">対戦相手は[2]より少ないコストでカードをプレイできない。（それより少ない<text:span text:style-name="T22">コストのカードをプレイするには、代わりに[2]を支払う必要がある。）</text:span></text:p>
      <text:p text:style-name="P29"><text:span text:style-name="T1">一過</text:span>（私がリザーブに送られるなら、代わりに捨て札にする。）</text:p>
      <text:p text:style-name="P31">1つを選ぶ:</text:p>
      <text:p text:style-name="P31">・対象の手札コスト[3]以下であり<text:span text:style-name="T1">ブースト中</text:span>のキャラクター1体を捨て札にする。</text:p>
      <text:p text:style-name="P31">・対象の手札コスト[3]以下であるパーマネントを捨て札にする。</text:p>
      <text:p text:style-name="P31">スカウト<text:span text:style-name="T23">[1]（あなたは私を手札から[1]でプレイしてもよい。そうしたなら「[表]私をリザーブに送る。」を持つ。）</text:span></text:p>
      <text:p text:style-name="P32">私が探検隊を離れた時-あなたは場（探検隊かランドマーク）やリザーブの対象のカード1つを増強してもよい。（それがカウンターを持っているなら、それは追加で<text:span text:style-name="T23">1個得る。ヒーローを対象にできない。）</text:span></text:p>
      <text:p text:style-name="P46">あなたの手札やデッキからカードが1枚リザーブに置かれたとき-あなたはあなたのリザーブのカードを1枚捨て札にしてもよい。そうしたなら、私は2ブーストを得る。</text:p>
      <text:p text:style-name="P33">[表]サボタージュする。（リザーブのカード最大1枚を対象とし、それを捨て札にする。）</text:p>
      <text:p text:style-name="P33">夕方に-あなたはあなたの手札のカードを1枚あなたのリザーブに置いてもよい。そうしたなら、カードを1枚引く。</text:p>
      <text:p text:style-name="P33">私が探検隊を離れるとき、私が<text:span text:style-name="T1">ブースト中</text:span>なら-私を持ち主のマナ・ゾーンに置く。（それらは消耗したマナ・オーブである）</text:p>
      <text:p text:style-name="P33">[ウラ]私は1ブーストを得る。（ブーストは+1/+1/+1カウンターである。探検隊を離れるとき、ブーストはなくなる。）</text:p>
      <text:p text:style-name="P33">タフ1（対戦相手が私を対象にするなら、[1]を追加で支払う。）</text:p>
      <text:p text:style-name="P33">私の探検隊が前進した時-エアロリストークン1つをあなたのランドマークに生成する。（それは「これが生け贄に捧げられたとき-リサプライする。」と「[消耗],[1]:これを生け贄に捧げる。」を持つパーマネンである。）</text:p>
      <text:p text:style-name="P33">あなたが最初にパスした時-私は1ブーストを得る。(ブーストは+1/+1/+1カウンターである。探検隊を離れるとき、ブーストはなくなる。)</text:p>
      <text:p text:style-name="P33">（ランドマーク。私が一過を得ることはない。）</text:p>
      <text:p text:style-name="P33">[消耗]:このターン、次にあなたがプレイする植物のコストは[1]減る。</text:p>
      <text:p text:style-name="P35">私の探検隊が森によって前進した時-あなたは私を持ち主のマナ・ゾーンに置いてもよい。（それらは消耗したマナ・オーブである）</text:p>
      <text:p text:style-name="P35">（ランドマーク。私が一過を得ることはない。）</text:p>
      <text:p text:style-name="P36">[消耗]:このターン、次にあなたが手札からプレイするキャラクターの[ウラ]能力を起動する。</text:p>
      <text:p text:style-name="P36">[表]リサプライする。（あなたのデッキの一番上のカードをあなたのリザーブに置く。）</text:p>
      <text:p text:style-name="P36"><text:span text:style-name="T1">一過</text:span>（私がリザーブに送られるなら、代わりに捨て札にする。）</text:p>
      <text:p text:style-name="P36">対象のキャラクターかパーマネントを捨て札にする。</text:p>
      <text:p text:style-name="P36">[表]リサプライする。その後、あなたはあなたのリザーブの呪文を1つあなたの手札に戻してもよい。（あなたのデッキの一番上のカードをあなたのリザーブに置く。）</text:p>
      <text:p text:style-name="P29">＜サポート＞<text:span text:style-name="T24">[捨て札]:このターン、あなたが次にプレイする呪文のコストは[1]減る。</text:span></text:p>
      <text:p text:style-name="P36">[両面]リサプライする。（あなたのデッキの一番上のカードをあなたのリザーブに置く。）</text:p>
      <text:p text:style-name="P36">[両面]あなたが他のキャラクターを3体以上コントロールしているなら、私は3ブーストを得る。（ブーストは+1/+1/+1カウンターである。探検隊を離れるとき、ブーストはなくなる。）</text:p>
      <text:p text:style-name="P26">あなたが他に2つ以上の植物をコントロールしていない限り、私は防衛を持つ。（私の探検隊は夕方に前進できない。）</text:p>
      <text:p text:style-name="P26"><text:span text:style-name="T1">一過</text:span>（私がリザーブに送られるなら、代わりに捨て札にする。）</text:p>
      <text:p text:style-name="P6">対象の探検隊は1地域後退する。</text:p>
      <text:p text:style-name="P37">[表]私は<text:span text:style-name="T1">睡眠</text:span>を得る。（夕方、私のスタッツを無視する。休息時、それはリザーブに送られず、代わりに睡眠を失う。）</text:p>
      <text:p text:style-name="P37">昼に-対象のプレイヤーは自分の手札のカード1枚をリザーブに置く。</text:p>
      <text:p text:style-name="P37">（ランドマーク。私が一過を得ることはない。）</text:p>
      <text:p text:style-name="P37">あなたが1つ以上の6面ダイスを振るなら、それに加えてあなたのデッキの一番上のカードも公開する。</text:p>
      <text:p text:style-name="P37">あなたがこれによってカードを公開したなら-そのカードの手札コストがダイスの出目に等しいなら、あなたはそれを無料で唱えるために私を消耗してもよい。（[表]効果は発動しない。）</text:p>
      <text:p text:style-name="P39">あなたが呪文をプレイするコストは、その基本コストが<text:span text:style-name="T20">[</text:span><text:span text:style-name="T25">7</text:span><text:span text:style-name="T20">]以上であるなら、[</text:span><text:span text:style-name="T25">2</text:span><text:span text:style-name="T20">]減る。（リザーブからプレイするならリザーブコスト、そうでないなら手札コストである。）</text:span></text:p>
      <text:p text:style-name="P39">対戦相手1人が1枚以上のカードを引いたりリサプライした時-私は1ブーストを得る。（ブーストは+1/+1/+1カウンターである。探検隊を離れるとき、ブーストはなくなる。）</text:p>
      <text:p text:style-name="P39">あなたが<text:span text:style-name="T25">6面ダイスを振るなら、その結果に1を加えてもよい</text:span></text:p>
      <text:p text:style-name="P7">＜サポート＞<text:span text:style-name="T18">[捨て札]:このターン、次にあなたがプレイするカードのコストは[1]減る。</text:span></text:p>
      <text:p text:style-name="P7">＜サポート＞<text:span text:style-name="T18">[捨て札]:このターン、次にあなたがプレイするパーマネントのコストは[1]減る。</text:span></text:p>
      <text:p text:style-name="P7">＜サポート＞<text:span text:style-name="T18">[捨て札]:お先にどうぞ。（カードをプレイしたかのようにあなたのターンを終了する。あなたはまだカードをプレイできる。）</text:span></text:p>
      <text:p text:style-name="P40">[ウラ]あなたはマナ・オーブ2つを非消耗にするために、私のブーストを1つ支払ってもよい。</text:p>
      <text:p text:style-name="P40">＜サポート＞[無限]あなたが呪文をプレイした時-私は2ブーストを最大として1ブーストを得る。（ブーストは+1/+1/+1カウンターである。探検隊を離れるとき、ブーストはなくなる。）</text:p>
      <text:p text:style-name="P42">（ランドマーク。私が一過を得ることはない。）</text:p>
      <text:p text:style-name="P42">あなたが最初にパスした時-対象のプレイヤーのランドマークにエアロリス トークンを1個生成する。（それは「これが生け贄に捧げられたとき-リサプライする。」と「[消耗],[1]:これを生け贄に捧げる。」を持つパーマネントである。）</text:p>
      <text:p text:style-name="P42"><text:span text:style-name="T1">一過</text:span>（私がリザーブに送られるなら、代わりに捨て札にする。）</text:p>
      <text:p text:style-name="P42">あなたは私のコストを<text:span text:style-name="T26">[1]減らすためにパーマネントを1つ生け贄に捧げてもよい。</text:span></text:p>
      <text:p text:style-name="P42">対象のキャラクターをリザーブに送る。</text:p>
      <text:p text:style-name="P43">[ウラ]私は3ブーストを得る。（ブーストは+1/+1/+1カウンターである。探検隊を離れるとき、ブーストはなくなる。）</text:p>
      <text:p text:style-name="P43">[表]サボタージュする。(リザーブのカード最大1枚を対象とし、それを捨て札にする。)これによってカードを1枚捨て札にしたなら、それのオーナーのコンパニオンの探検隊にウーリーバック 1/1/1 動物 トークン1体を生成する。あなたはそれに<text:span text:style-name="T1">睡眠</text:span>を得させてもよい。(夕方、私のスタッツを無視する。休息時、それはリザーブに送られず、代わりに睡眠を失う。)</text:p>
      <text:p text:style-name="P43">私が生け贄に捧げられた時、私が<text:span text:style-name="T1">一過</text:span>でないなら-私をリザーブに置く。</text:p>
      <text:p text:style-name="P43">私が生け贄に捧げられた時、私が<text:span text:style-name="T1">一過</text:span>なら-カードを1枚引く。</text:p>
      <text:p text:style-name="P43">[両面]私は<text:span text:style-name="T1">アンカー</text:span>を得る。(休息時、私はリザーブに送られず、代わりにアンカーを失う。)</text:p>
      <text:p text:style-name="P45">[表]あなたはあなたのリザーブから呪文1つをあなたの手札に戻してもよい。</text:p>
      <text:p text:style-name="P45">&lt;サポート&gt;[捨て札]:このターン、次にあなたがプレイする呪文のコストは[1]減る。</text:p>
      <text:p text:style-name="P45">(ランドマーク。私が一過を得ることはない。)</text:p>
      <text:p text:style-name="P45">[両面]リサプライする。(あなたのデッキの一番上のカードをあなたのリザーブに置く。)</text:p>
      <text:p text:style-name="P20">あなたのリザーブ上限は1増える。</text:p>
      <text:p text:style-name="P70">一過<text:span text:style-name="T16">（私がリザーブに送られるなら、代わりに捨て札にする。）</text:span></text:p>
      <text:p text:style-name="P20">6面ダイスを振り、キャラクター1体を対象とする。</text:p>
      <text:p text:style-name="P20">・<text:span text:style-name="T27">4+なら、それは</text:span><text:span text:style-name="T4">アンカー</text:span><text:span text:style-name="T27">を得る。（休息時、私はリザーブに送られず、代わりにアンカーを失う。）</text:span></text:p>
      <text:p text:style-name="P20">・<text:span text:style-name="T27">1-3なら、それは</text:span><text:span text:style-name="T4">睡眠</text:span><text:span text:style-name="T27">を得る。（夕方、私のスタッツを無視する。休息時、それはリザーブに送られず、代わりに睡眠を失う。）</text:span></text:p>
      <text:p text:style-name="P20">（ランドマーク。私が一過を得ることはない。）</text:p>
      <text:p text:style-name="P20">［両面］消耗リサプライする。（あなたのデッキの一番上のカードをあなたのリザーブに置く。それを消耗する。それは消耗している限り、サポート能力を失い、プレイできない。）</text:p>
      <text:p text:style-name="P20">昼に-消耗リサプライする。</text:p>
      <text:p text:style-name="P21">あなたは夜の間、追加で1枚の消耗したカードをリザーブに保持することができる。<text:line-break/><text:span text:style-name="T15">（私を探検隊にプレイする。私の探検隊が前進したなら、休息時に私をリザーブに送る。）</text:span></text:p>
      <text:p text:style-name="P9">私の探検隊が前進するなら、前進する代わりに私を捨て札にしてもよい。そうしたなら、カードを2枚引く。</text:p>
      <text:p text:style-name="P9">［両面］私の探検隊が遅れているなら、オーディスの新兵 1/1/1 兵士 トークン<text:span text:style-name="T27">1体を私の探検隊に生成する。</text:span></text:p>
      <text:p text:style-name="P9">＜サポート＞<text:span text:style-name="T27">[</text:span>捨て札<text:span text:style-name="T27">]:対象の探検隊にオーディスの新兵 1/1/1 兵士 トークン1体を生成する。</text:span></text:p>
      <text:p text:style-name="P9"><text:soft-page-break/>［表］カードを1枚引く。</text:p>
      <text:p text:style-name="P9">（私を探検隊にプレイする。私の探検隊が前進したなら、休息時に私をリザーブに送る。）</text:p>
      <text:p text:style-name="P9">私の探検隊が夕方に前進するなら、代わりに1地域追加で前進する。</text:p>
      <text:p text:style-name="P9">[ウラ]あなたは即座にパスしてもよい。そうしたなら、私は1ブーストを得る。（パスしたらそれ以上カードをプレイできない）（ブーストは+1/+1/+1カウンターである。探検隊を離れるとき、ブーストはなくなる。）</text:p>
      <text:p text:style-name="P9">[両面]対象の対戦相手は即座に基本コスト<text:span text:style-name="T27">[4]以上のカード1枚を無料でプレイしてもよい。</text:span><text:span text:style-name="T20">（リザーブからプレイするならリザーブコスト、そうでないなら手札コストである。）</text:span></text:p>
      <text:p text:style-name="P9">[ウラ]あなたはあなたがコントロールする対象のパーマネント1つの[両面]能力を起動してもよい。</text:p>
      <text:p text:style-name="P9">[ウラ]私は2ブーストを得る。（ブーストは+1/+1/+1カウンターである。探検隊を離れるとき、ブーストはなくなる。）</text:p>
      <text:p text:style-name="P48">巨大（私はあなたの両方の探検隊に存在しているとみなす。）</text:p>
      <text:p text:style-name="P48">[表]あなたはあなたの手札のカードを1枚リザーブに置いてもよい。そうしたなら私は3ブーストを得る。（ブーストは+1/+1/+1カウンターである。探検隊を離れるとき、ブーストはなくなる。）</text:p>
      <text:p text:style-name="P48">[ウラ]リサプライ（あなたのデッキの一番上のカードをあなたのリザーブに置く。）</text:p>
      <text:p text:style-name="P48">[両面]あなたはキャラクターかパーマネントを1つ生け贄に捧げてもよい。そうしたなら、カードを1枚引く。</text:p>
      <text:p text:style-name="P48">私が探検隊からリザーブに移動した時-対象の対戦相手はカードを1枚引く。</text:p>
      <text:p text:style-name="P48">私が<text:span text:style-name="T1">一過</text:span>でないなら、<text:span text:style-name="T15">防衛を持つキャラクターは私の探検隊の前進を妨げない。</text:span></text:p>
      <text:p text:style-name="P48">[ウラ]あなたは対象の対戦相手にカードを1枚引かせてもよい。そうしたなら、私は<text:span text:style-name="T1">アンカー</text:span>を得る。（休息時、私はリザーブに送られず、代わりにアンカーを失う。）</text:p>
      <text:p text:style-name="P9">＜サポート＞[無限]他のキャラクターが1体あなたの探検隊に加わるたび-私は2ブーストを最大として1ブーストを得る。</text:p>
      <text:p text:style-name="P9">[両面]私が森の探検隊と相対しているなら、リサプライする。（あなたのデッキの一番上のカードをあなたのリザーブに置く。）</text:p>
      <text:p text:style-name="P9">&lt;サポート&gt;<text:span text:style-name="T30">[捨て札]:あなたのリザーブの呪文1つをあなたの手札に戻してもよい。</text:span></text:p>
      <text:p text:style-name="P9">（ランドマーク。私が一過を得ることはない。）</text:p>
      <text:p text:style-name="P9">[両面]カードを1枚引く。</text:p>
      <text:p text:style-name="P9">私が生け贄に捧げられた時-カードを1枚引く。（上限を超えたランドマークは夜に生け贄に捧げられる。）</text:p>
      <text:p text:style-name="P48">[消耗],[1]:私を生け贄に捧げる。</text:p>
      <text:p text:style-name="P48">（私を探検隊にプレイする。私の探検隊が前進したなら、休息時に私をリザーブに送る。）</text:p>
      <text:p text:style-name="P48">[両面]リサプライする。（あなたのデッキの一番上のカードをあなたのリザーブに置く。）</text:p>
      <text:p text:style-name="P48"><text:span text:style-name="T1">アンカー</text:span><text:span text:style-name="T16">（休息時、私はリザーブに送られず、代わりにアンカーを失う。）</text:span>であるキャラクターが私の探検隊を午後の間に離れるなら、それは代わりに<text:span text:style-name="T1">アンカー</text:span>を失う。</text:p>
      <text:p text:style-name="P48">（ランドマーク。私が一過を得ることはない。）</text:p>
      <text:p text:style-name="P48">トークンでないキャラクターが1体あなたのいずれかの探検隊に加わった時、その探検隊が遅れているなら-私は<text:span text:style-name="T28">試練カウンターを1個得る。</text:span></text:p>
      <text:p text:style-name="P21">私が私の3個目の試練カウンターを得たとき-私を生け贄に捧げる。ドラゴンの影 5/5/5 イリュージョン トークン<text:span text:style-name="T20">1体を</text:span>対象の探検隊に生成する。対象のキャラクターは<text:span text:style-name="T1">睡眠</text:span>を得る。（夕方、私のスタッツを無視する。休息時、それはリザーブに送られず、代わりに睡眠を失う。）</text:p>
      <text:p text:style-name="P21">（ランドマーク。私が一過を得ることはない。）</text:p>
      <text:p text:style-name="P21">[両面]あなたはリサプライするために<text:span text:style-name="T30">[1]を支払ってもよい。（あなたのデッキの一番上のカードをあなたのリザーブに置く。）</text:span></text:p>
      <text:p text:style-name="P34">[消耗]:このターン、次にあなたがプレイする植物のコストは[1]減る。</text:p>
      <text:p text:style-name="P34">カードを1枚引く。</text:p>
      <text:p text:style-name="P34">[表]サボタージュする。(リザーブのカード最大1枚を対象とし、それを捨て札にする。)</text:p>
      <text:p text:style-name="P34">&lt;サポート&gt;<text:span text:style-name="T30">[捨て札]:お先にどうぞ。</text:span><text:span text:style-name="T18">（カードをプレイしたかのようにあなたのターンを終了する。あなたはまだカードをプレイできる。）</text:span></text:p>
      <text:p text:style-name="P34">（私を探検隊にプレイする。私の探検隊が前進したなら、休息時に私をリザーブに送る。）</text:p>
      <text:p text:style-name="P34">[両面]私の探検隊にブラスバグ 2/2/2 ロボット トークン<text:span text:style-name="T30">1体を生成する。</text:span></text:p>
      <text:p text:style-name="P34">巨大（私はあなたの両方の探検隊に存在しているとみなす。）</text:p>
      <text:p text:style-name="P34">[表]カードを1枚引く。</text:p>
      <text:p text:style-name="P34">[表]対象の対戦相手はカードを1枚引く。</text:p>
      <text:p text:style-name="P34">永遠(私は休息時にリザーブに送られない。)</text:p>
      <text:p text:style-name="P34">[両面]私は4ブーストを得る。（ブーストは+1/+1/+1カウンターである。探検隊を離れるとき、ブーストはなくなる。）</text:p>
      <text:p text:style-name="P34">昼に-私は4ブーストを得る。</text:p>
      <text:p text:style-name="P34">キャラクター1体が、私と対面する探検隊に加わった時-あなたは私の探検隊を入れ替わらせてもよい。</text:p>
      <text:p text:style-name="P34">タフ<text:span text:style-name="T31">1（対戦相手が私を対象にするなら、[1]を追加で支払う。）</text:span></text:p>
      <text:p text:style-name="P49">[両面]私が海にいないなら、私は<text:span text:style-name="T1">一過</text:span>を得る。(私がリザーブに送られるなら、代わりに捨て札にする。)</text:p>
      <text:p text:style-name="P49">永遠（私は休息時にリザーブに送られない。）</text:p>
      <text:p text:style-name="P49">リザーブにある消耗したキャラクターは、朝の間に消耗したままとどまる。</text:p>
      <text:p text:style-name="P49">（ランドマーク。私が一過を得ることはない。）</text:p>
      <text:p text:style-name="P49">昼に-<text:span text:style-name="T32">あなたは場（探検隊かランドマーク）やリザーブの対象のカード1つを増強してもよい。（それがカウンターを持っているなら、それは追加で</text:span><text:span text:style-name="T23">1個得る。ヒーローを対象にできない。）</text:span></text:p>
      <text:p text:style-name="P49">[両面]私の探検隊のキャラクターを1体生け贄に捧げる。</text:p>
      <text:p text:style-name="P49"><text:span text:style-name="T1">一過</text:span>（私がリザーブに送られるなら、代わりに捨て札にする。）</text:p>
      <text:p text:style-name="P49">あなたは即座に<text:span text:style-name="T33">[7]コスト減らしてキャラクターを1つプレイしてもよい。それは</text:span><text:span text:style-name="T5">アンカー</text:span><text:span text:style-name="T33">を得る。（休息時、私はリザーブに送られず、代わりにアンカーを失う。）</text:span></text:p>
      <text:p text:style-name="P49">私が探検隊を離れる時、私が<text:span text:style-name="T1">一過</text:span>であったなら-カードを1枚引く。</text:p>
      <text:p text:style-name="P49">[ウラ]私は1ブーストを得る。（ブーストは+1/+1/+1カウンターである。探検隊を離れるとき、ブーストはなくなる。）</text:p>
      <text:p text:style-name="P49">（私を探検隊にプレイする。私の探検隊が前進したなら、休息時に私をリザーブに送る。）</text:p>
      <text:p text:style-name="P49">[ウラ]私は<text:span text:style-name="T1">一過</text:span>を失う。</text:p>
      <text:p text:style-name="P49">私の探検隊のキャラクターはそれぞれ森、山、海について、それらのうち最大のスタッツを持つ。</text:p>
      <text:p text:style-name="P49">あなたがコントロールする対象のパーマネントの[両面]能力を起動する。</text:p>
      <text:p text:style-name="P49">[表]私は3ブーストを得る。(ブーストは+1/+1/+1カウンターである。探検隊を離れるとき、ブーストはなくなる。)</text:p>
      <text:p text:style-name="P49">[表]最大1体の対象のキャラクターは<text:span text:style-name="T1">睡眠</text:span>を得る。(夕方、私のスタッツを無視する。休息時、それはリザーブに送られず、代わりに睡眠を失う。)</text:p>
      <text:p text:style-name="P49">[ウラ]<text:span text:style-name="T28">消耗リサプライする。（あなたのデッキの一番上のカードをあなたのリザーブに置く。それを消耗する。それは消耗している限り、サポート能力を失い、プレイできない。）</text:span></text:p>
      <text:p text:style-name="P49">巨大（私はあなたの両方の探検隊に存在しているとみなす。）</text:p>
      <text:p text:style-name="P49">対象のキャラクターかパーマネントを持ち主の手札に戻す。その後、あなたは私をマナ・ゾーンに置いてもよい。（それらは消耗したマナ・オーブである）</text:p>
      <text:p text:style-name="P21">＜サポート＞<text:span text:style-name="T20">[捨て札]:対象の手札コストが[3]以下であるキャラクター1体は</text:span><text:span text:style-name="T3">アンカー</text:span><text:span text:style-name="T20">を得る。（休息時、私はリザーブに送られず、代わりにアンカーを失う。）</text:span></text:p>
      <text:p text:style-name="P21">[両面]私がキャラクターに相対しているなら、私は1ブーストを得る。(ブーストは+1/+1/+1カウンターである。探検隊を離れるとき、ブーストはなくなる。)</text:p>
      <text:p text:style-name="P21"><text:span text:style-name="T1">一過</text:span>（私がリザーブに送られるなら、代わりに捨て札にする。）</text:p>
      <text:p text:style-name="P21">合計で山が4以下である望む数の対象のキャラクターをリザーブに送る。</text:p>
      <text:p text:style-name="P21">＜サポート＞<text:span text:style-name="T20">[捨て札]:対象の手札コストが[</text:span><text:span text:style-name="T34">4</text:span><text:span text:style-name="T20">]以下であるキャラクター1体は</text:span><text:span text:style-name="T3">睡眠</text:span><text:span text:style-name="T20">を得る。(夕方、私のスタッツを無視する。休息時、それはリザーブに送られず、代わりに睡眠を失う。)</text:span></text:p>
      <text:p text:style-name="P53"><text:span text:style-name="T1">一過</text:span>（私がリザーブに送られるなら、代わりに捨て札にする。）</text:p>
      <text:p text:style-name="P53">対象のあなたの探検隊を1地域後退させる。そうしたなら、あなたの他の探検隊を1地域前進させる。</text:p>
      <text:p text:style-name="P53">(ランドマーク。私が一過を得ることはない。)</text:p>
      <text:p text:style-name="P53">[両面]対象の探検隊は上昇する。(休息時まで、それは対戦相手の探検隊とその地域の地形で同点であったとしても前進できる。)</text:p>
      <text:p text:style-name="P53">あなたがキャラクターを1体プレイした時-それが上昇している探検隊にいるなら、あなたはそれに1ブーストを与えるために私を消耗してもよい。(ブーストは+1/+1/+1カウンターである。探検隊を離れるとき、ブーストはなくなる。)</text:p>
      <text:p text:style-name="P53">（私を探検隊にプレイする。私の探検隊が前進したなら、休息時に私をリザーブに送る。）</text:p>
      <text:p text:style-name="P53">キャラクター1体が私の探検隊に加わった時-それは1ブーストと<text:span text:style-name="T1">一過</text:span>を得る。(ブーストは+1/+1/+1カウンターである。探検隊を離れるとき、ブーストはなくなる。)（私がリザーブに送られるなら、代わりに捨て札にする。）</text:p>
      <text:p text:style-name="P41">[ウラ]あなたはマナ・オーブ2つを非消耗にするために、私のブーストを1つ支払ってもよい。</text:p>
      <text:p text:style-name="P41">＜サポート＞<text:span text:style-name="T15">[無限]昼に-1つを選ぶ:</text:span></text:p>
      <text:p text:style-name="P53">・私は3ブーストを最大として1ブーストを得る。</text:p>
      <text:p text:style-name="P41">・<text:span text:style-name="T15">[消耗]:私は3ブーストを最大として2ブーストを得る。</text:span></text:p>
      <text:p text:style-name="P41">私の探検隊が夕方に前進するのに失敗した時-休息後にサボタージュする。(リザーブのカード最大1枚を対象とし、それを捨て札にする。)</text:p>
      <text:p text:style-name="P9">＜サポート＞[捨て札]:対象の探検隊にオーディスの新兵 1/1/1 兵士 トークンを1体生成する。</text:p>
      <text:p text:style-name="P9">リザーブの他のカードを1枚捨て札にする。そうしたなら、対象のキャラクターは2ブーストを得る。(ブーストは+1/+1/+1カウンターである。探検隊を離れるとき、ブーストはなくなる。)</text:p>
      <text:p text:style-name="P53">夕方に私の探検隊が前進するなら、6面ダイスを1個振る。</text:p>
      <text:p text:style-name="P53">・4<text:span text:style-name="T34">+ <text:s/>それは</text:span>代わりに1地域追加で前進する。</text:p>
      <text:p text:style-name="P53">・<text:span text:style-name="T34">1 それは</text:span>代わりに前進しない。</text:p>
      <text:p text:style-name="P53">(ランドマーク。私が一過を得ることはない。)</text:p>
      <text:p text:style-name="P53"><text:span text:style-name="T34">[消耗]:</text:span>対象の対戦相手のコンパニオンの探検隊に、ウーリーバック 1/1/1 動物 トークン<text:span text:style-name="T34">1体を生成する。あなたがこのターンに次にプレイするキャラクターは、1ブーストを得る。(ブーストは+1/+1/+1カウンターである。探検隊を離れるとき、ブーストはなくなる。)</text:span></text:p>
      <text:p text:style-name="P50">プレイヤー1人を対象とする。今日、そのプレイヤーがコントロールする手札コスト[3]以上のキャラクターはタフ[5]である（対戦相手が私を対象にするなら、[5]を追加で支払う。）</text:p>
      <text:p text:style-name="P53">夕方に-私が<text:span text:style-name="T1">ブースト中</text:span>なら、あなたのデッキの一番上のカードを公開する。それが<text:span text:style-name="T35">0である基本スタッツを持つキャラクターであるなら、それを引く。そうでないなら、それを捨て札にする。</text:span></text:p>
      <text:p text:style-name="P53">＜サポート＞<text:span text:style-name="T15">[</text:span>無限<text:span text:style-name="T15">]あなたが他の0である基本スタッツを持つキャラクターをプレイした時-私は2ブーストを最大として1ブーストを得る。</text:span></text:p>
      <text:p text:style-name="P53">[表]私はあなたに<text:span text:style-name="T1">睡眠</text:span>を得させてもよい。（夕方、私のスタッツを無視する。休息時、それはリザーブに送られず、代わりに睡眠を失う。）</text:p>
      <text:p text:style-name="P53">他のキャラクターが1体あなたの探検隊に加わる時-それは1ブーストを得る。（ブーストは+1/+1/+1カウンターである。探検隊を離れるとき、ブーストはなくなる。）</text:p>
      <text:p text:style-name="P21">消耗リサプライする。（あなたのデッキの一番上のカードをあなたのリザーブに置く。それを消耗する。それは消耗している限り、サポート能力を失い、プレイできない。）</text:p>
      <text:p text:style-name="P49">[両面]<text:span text:style-name="T36">6面ダイスを1個振る。4+なら、私は</text:span><text:span text:style-name="T6">アンカー</text:span><text:span text:style-name="T36">を得る。1-3なら、私は3ブーストを得る。（休息時、私はリザーブに送られず、代わりにアンカーを失う。）（ブーストは+1/+1/+1カウンターである。探検隊を離れるとき、ブーストはなくなる。）</text:span></text:p>
      <text:p text:style-name="P49">スカウト<text:span text:style-name="T36">[1]（あなたは私を手札から[1]でプレイしてもよい。そうしたなら「[表]私をリザーブに送る。」を持つ。）</text:span></text:p>
      <text:p text:style-name="P49">[両面]対象のキャラクターは1ブーストを得る。（ブーストは+1/+1/+1カウンターである。探検隊を離れるとき、ブーストはなくなる。）</text:p>
      <text:p text:style-name="P49">あなたが手札コスト<text:span text:style-name="T36">[3]以上のパーマネント1つをプレイした時-あなたは対象の探検隊にブラスバグ 2/2/2 ロボット トークン1体を生成するために私を消耗してもよい。</text:span></text:p>
      <text:p text:style-name="P49"><text:span text:style-name="T36">[</text:span>消耗<text:span text:style-name="T36">]:あなたのコンパニオンの探検隊に、マウ 0/0/0 コンパニオン トークンを1体生成する。それは「あなたがキャラクター1体を生け贄に捧げた時-私は2ブーストを得る。」を持つ。このアクションはあなたが先手でないなら、[1]コスト増える。（ブーストは+1/+1/+1カウンターである。探検隊を離れるとき、ブーストはなくなる。）</text:span></text:p>
      <text:p text:style-name="P49">あなたが基本コスト<text:span text:style-name="T36">[4]以上である呪文を1つプレイした時-あなたはあなたのヒーローの探検隊にマナ・モス 2/2/2 イリュージョン トークン1体を生成するために私を消耗してもよい。その基本コストが[7]以上なら、さらにカードを1枚引く。（リザーブからプレイするならリザーブコスト、そうでないなら手札コストである。）</text:span></text:p>
      <text:p text:style-name="P49">あなたがプレイする手札コストが<text:span text:style-name="T36">[1]の呪文は</text:span><text:span text:style-name="T6">一過</text:span><text:span text:style-name="T36">を持つ。（私がリザーブに送られるなら、代わりに捨て札にする。）</text:span></text:p>
      <text:p text:style-name="P49">あなたが呪文を1つプレイした時-あなたがコントロールする対象のキャラクターは1ブーストを得る。（ブーストは+1/+1/+1カウンターである。探検隊を離れるとき、ブーストはなくなる。）</text:p>
      <text:p text:style-name="P49">あなたのコントロールするキャラクター1体が1つ以上のブーストを得た時-あなたは対象のキャラクターに<text:span text:style-name="T36">1ブーストを得させるために私を消耗してもよい。（ブーストは+1/+1/+1カウンターである。探検隊を離れるとき、ブーストはなくなる。）</text:span></text:p>
      <text:p text:style-name="P49">午後にカード1枚があなたのリザーブを離れた時、私が5個よりも少ないスクラップカウンターを持っているなら-私はスクラップカウンターを得る。</text:p>
      <text:p text:style-name="P49">私が<text:span text:style-name="T36">5個以上のスクラップカウンターを持っているなら、私は「[消耗]:カードを1枚引き、その後あなたの手札のカードを1枚リザーブに置く。」を持つ。</text:span></text:p>
      <text:p text:style-name="P53">あなたが<text:span text:style-name="T35">0である基本スタッツを持つキャラクター1体をプレイした時-私はパフォーマンスカウンターを1個得る。</text:span></text:p>
      <text:p text:style-name="P53">昼に-あなたはあなたのデッキの一番上のカードを公開するために私のパフォーマンスカウンター5個を支払ってもよい。あなたはそれを無料でプレイするか、それを手札に加える。（[表]効果は発動しない。）</text:p>
      <text:p text:style-name="P49">&lt;サポート&gt;<text:span text:style-name="T37">[</text:span>無限<text:span text:style-name="T37">]私はリザーブ上限に数えない。</text:span></text:p>
      <text:p text:style-name="P49">対象のキャラクターは<text:span text:style-name="T1">睡眠</text:span>を得る。(夕方、私のスタッツを無視する。休息時、それはリザーブに送られず、代わりに睡眠を失う。)</text:p>
      <text:p text:style-name="P9">＜サポート＞<text:span text:style-name="T18">[捨て札]:このターン、次にあなたがプレイするカードのコストは[1]減る。</text:span></text:p>
      <text:p text:style-name="P9">永遠（私は休息時にリザーブに送られない。）</text:p>
      <text:p text:style-name="P9">昼に-対象の探検隊は上昇する。（休息時まで、それは対戦相手の探検隊とその地域の地形で同点であったとしても前進できる。）</text:p>
      <text:p text:style-name="P9">あなたが8つ以上のマナ・オーブを持っていない限り、私は防衛を持つ。（私の探検隊は夕方に前進できない。）</text:p>
      <text:p text:style-name="P9">[両面]私は<text:span text:style-name="T38">2</text:span>ブーストを得る。(ブーストは+1/+1/+1カウンターである。探検隊を離れるとき、ブーストはなくなる。)</text:p>
      <text:p text:style-name="P9">[両面]私はあなたのコントロールする<text:span text:style-name="T1">一過</text:span>であるキャラクターにつき1ブーストを得る。（ブーストは+1/+1/+1カウンターである。探検隊を離れるとき、ブーストはなくなる。）</text:p>
      <text:p text:style-name="P9">私のコストはリザーブの消耗しているカードにつき<text:span text:style-name="T39">[1]減る。</text:span></text:p>
      <text:p text:style-name="P9">マナ・モス 2/2/2 イリュージョン トークン<text:span text:style-name="T39">3体を、</text:span>望む数の対象の探検隊に望むように割り振って生成する。</text:p>
      <text:p text:style-name="P9">（ランドマーク。私が一過を得ることはない。）</text:p>
      <text:p text:style-name="P9"><text:soft-page-break/>あなたのコントロールするキャラクターはタフ2を持つ。（対戦相手が私を対象にするなら、[2]を追加で支払う。）</text:p>
      <text:p text:style-name="P9">1つを選ぶ:</text:p>
      <text:p text:style-name="P9">・リザーブの対象の消耗しているカードを捨て札にする。</text:p>
      <text:p text:style-name="P9">・リザーブの対象のカードを消耗する。（それは消耗している限り、サポート能力を失い、プレイできない。）</text:p>
      <text:p text:style-name="P71">一過<text:span text:style-name="T16">（私がリザーブに送られるなら、代わりに捨て札にする。）</text:span></text:p>
      <text:p text:style-name="P72">あなたがあなたのコントロールするキャラクターに合わせて<text:span text:style-name="T39">3つ以上の0である基本スタッツを持っているなら、私のコストは[2]減る。</text:span></text:p>
      <text:p text:style-name="P72">対象のキャラクターをリザーブに送り、その後それを消耗する。（それは消耗している限り、サポート能力を失い、プレイできない。）</text:p>
      <text:p text:style-name="P9">＜サポート＞<text:span text:style-name="T18">[捨て札]:このターン、次にあなたがプレイするパーマネントのコストは[1]減る。</text:span></text:p>
      <text:p text:style-name="P53">（ランドマーク。私が一過を得ることはない。）</text:p>
      <text:p text:style-name="P53">私が生け贄に捧げられたとき-ブラスバグ 2/2/2 ロボット トークンを、あなたの各探検隊に生成する。</text:p>
      <text:p text:style-name="P51">カードを1枚引く。</text:p>
      <text:p text:style-name="P51">あなたの両方の探検隊は上昇する。（休息時まで、それは対戦相手の探検隊とその地域の地形で同点であったとしても前進できる。）</text:p>
      <text:p text:style-name="P51">即座に最大2体までの基本コスト[3]以下のキャラクターを無料でプレイする（リザーブからプレイするならリザーブコスト、そうでないなら手札コストである。）。</text:p>
      <text:p text:style-name="P53">（ランドマーク。私が一過を得ることはない。）</text:p>
      <text:p text:style-name="P53">私が生け贄に捧げられたとき-ブラスバグ 2/2/2 ロボット トークンを、あなたの各探検隊に生成する。</text:p>
      <text:p text:style-name="P52">[消耗],[1],パーマネント1つを生け贄に捧げる:対象の探検隊にブラスバグ 2/2/2 ロボット トークン1体を生成する。</text:p>
      <text:p text:style-name="P52">[ウラ]1つまで選ぶ:</text:p>
      <text:p text:style-name="P52">・対象の手札コスト[3]以下のパーマネントを捨て札にする。</text:p>
      <text:p text:style-name="P52">・パーマネント1つを生け贄に捧げる。そうしたなら、対象の探検隊にブラスバグ 2/2/2 ロボット トークン1体を生成する。</text:p>
      <text:p text:style-name="P52"><text:span text:style-name="T1">一過</text:span>（私がリザーブに送られるなら、代わりに捨て札にする。）</text:p>
      <text:p text:style-name="P52">あなたがイリュージョンをコントロールしているなら、私のコストは[2]減る。</text:p>
      <text:p text:style-name="P74">対象の手札コスト[3]以下のキャラクターを捨て札にする。</text:p>
      <text:p text:style-name="P73">あなたが6面ダイスを1個以上振るなら、代わりにそれに1個を加えた数のダイスを振り、あなたが選んだ出目を無視する。</text:p>
      <text:p text:style-name="P73">[表]あなたは<text:span text:style-name="T40">[2]を支払ってもよい。そうしたなら、私と対面している探検隊の対象のキャラクターは</text:span><text:span text:style-name="T7">睡眠</text:span><text:span text:style-name="T40">を得る。(夕方、私のスタッツを無視する。休息時、それはリザーブに送られず、代わりに睡眠を失う。)</text:span></text:p>
      <text:p text:style-name="P73">&lt;サポート&gt;<text:span text:style-name="T40">[捨て札]:あなたがコントロールする対象の手札コスト[4]以下のキャラクターは</text:span><text:span text:style-name="T7">睡眠</text:span><text:span text:style-name="T40">を得る。(夕方、私のスタッツを無視する。休息時、それはリザーブに送られず、代わりに睡眠を失う。)</text:span></text:p>
      <text:p text:style-name="P73">[両面]私はアンカーを得る。(休息時、私はリザーブに送られず、代わりにアンカーを失う。)</text:p>
      <text:p text:style-name="P73">昼に-私は1ブーストを得る。(ブーストは+1/+1/+1カウンターである。探検隊を離れるとき、ブーストはなくなる。)</text:p>
      <text:p text:style-name="P73">対戦相手1人がリザーブからカードを<text:span text:style-name="T40">1枚</text:span>プレイした時-私の探検隊にオーディスの新兵 1/1/1 兵士 トークン<text:span text:style-name="T40">1体を生成する。</text:span></text:p>
      <text:p text:style-name="P73">[表]あなたから始めて、各プレイヤーは即座に手札コスト<text:span text:style-name="T40">[3]以下のカードを無料でプレイしてもよい。</text:span></text:p>
      <text:p text:style-name="P44">[表]サボタージュする。(リザーブのカード最大1枚を対象とし、それを捨て札にする。)これによってカードを1枚捨て札にしたなら、それのオーナーのコンパニオンの探検隊にウーリーバック 1/1/1 動物 トークン1体を生成する。</text:p>
      <text:p text:style-name="P44">[両面]私がキャラクターと相対しているなら、私は1ブーストを得る。(ブーストは+1/+1/+1カウンターである。探検隊を離れるとき、ブーストはなくなる。)</text:p>
      <text:p text:style-name="P44">[ウラ]私の探検隊は上昇する。(休息時まで、それは対戦相手の探検隊とその地域の地形で同点であったとしても前進できる。)</text:p>
      <text:p text:style-name="P44"><text:span text:style-name="T1">一過</text:span>（私がリザーブに送られるなら、代わりに捨て札にする。）</text:p>
      <text:p text:style-name="P44">エクスペディション2つを対象とし、ウーリーバック 1/1/1 動物 トークン<text:span text:style-name="T41">1体をそれぞれに生成する。その後、手札コスト[1]以下の各キャラクターは睡眠を得る。(夕方、私のスタッツを無視する。休息時、それはリザーブに送られず、代わりに睡眠を失う。)</text:span></text:p>
      <text:p text:style-name="P9">[両面]私は対象の対戦相手がコントロールするキャラクター1体につき、1ブーストを得る。（ブーストは+1/+1/+1カウンターである。探検隊を離れるとき、ブーストはなくなる。）</text:p>
      <text:p text:style-name="P9">(ランドマーク。私が一過を得ることはない。)</text:p>
      <text:p text:style-name="P9">私が<text:span text:style-name="T1">一過</text:span>を得るなら、代わりに1ブーストを得る。（ブーストは+1/+1/+1カウンターである。探検隊を離れるとき、ブーストはなくなる。）</text:p>
      <text:p text:style-name="P9">[両面]リサプライする。(あなたのデッキの一番上のカードをあなたのリザーブに置く。)</text:p>
      <text:p text:style-name="P9">昼に-3つ以上の、1つの地形である地域が見えているなら、あなたはリザーブの対象のキャラクターに1ブーストを得させてもよい。（ブーストは+1/+1/+1カウンターである。探検隊を離れるとき、ブーストはなくなる。）</text:p>
      <text:p text:style-name="P73">スカウト<text:span text:style-name="T41">[1]（あなたは私を手札から[1]でプレイしてもよい。そうしたなら「[表]私をリザーブに送る。」を持つ。）</text:span></text:p>
      <text:p text:style-name="P73">[両面]あなたは他の対象のキャラクターに<text:span text:style-name="T1">一過</text:span>を失わせるとともに<text:span text:style-name="T41">1ブーストを得させてもよい。(ブーストは+1/+1/+1カウンターである。探検隊を離れるとき、ブーストはなくなる。)</text:span></text:p>
      <text:p text:style-name="P73">[両面]6面ダイスを1個振る。<text:span text:style-name="T41">4+なら、私は2ブーストを得る。1-3なら、私は1ブーストを得る。（ブーストは+1/+1/+1カウンターである。探検隊を離れるとき、ブーストはなくなる。）</text:span></text:p>
      <text:p text:style-name="P53"><text:span text:style-name="T1">一過</text:span><text:span text:style-name="T16">（私がリザーブに送られるなら、代わりに捨て札にする。）</text:span></text:p>
      <text:p text:style-name="P53">1つを選ぶ：</text:p>
      <text:p text:style-name="P53">・対象の<text:span text:style-name="T1">一過</text:span>、<text:span text:style-name="T1">アンカー</text:span>、または<text:span text:style-name="T1">睡眠</text:span>であるキャラクターを捨て札にする。</text:p>
      <text:p text:style-name="P53">・対象のパーマネントを捨て札にする。</text:p>
      <text:p text:style-name="P53">私はあなたが2体以上の官僚をコントロールしていない限り、防衛を持つ。（私の探検隊は夕方に前進できない。）</text:p>
      <text:p text:style-name="P41">私の探検隊が夕方に前進するのに失敗した時-あなたのランドマークに、エアロリス トークン1個を生成する。（それは「これが生け贄に捧げられたとき-リサプライする。」と「［消耗］,［1］:これを生け贄に捧げる。」を持つパーマネントである。）</text:p>
      <text:p text:style-name="P41">[表]対象の探検隊は上昇する。(休息時まで、それは対戦相手の探検隊とその地域の地形で同点であったとしても前進できる。)</text:p>
      <text:p text:style-name="P41">[表]あなたのランドマークに、エアロリス トークン1個を生成する。（それは「これが生け贄に捧げられたとき-リサプライする。」と「［消耗］,［1］:これを生け贄に捧げる。」を持つパーマネントである。）</text:p>
      <text:p text:style-name="P41">[ウラ]あなたはパーマネント1つを生け贄に捧げてもよい。</text:p>
      <text:p text:style-name="P41">あなたが1個以上の6面ダイスを振った時-私は1ブーストを得る。(ブーストは+1/+1/+1カウンターである。探検隊を離れるとき、ブーストはなくなる。)</text:p>
      <text:p text:style-name="P41">（ランドマーク。私が一過を得ることはない。）</text:p>
      <text:p text:style-name="P41">昼に-あなたの対戦相手が先手なら、あなたのランドマークに、エアロリス トークン1個を生成する。（それは「これが生け贄に捧げられたとき-リサプライする。」と「［消耗］,［1］:これを生け贄に捧げる。」を持つパーマネントである。）</text:p>
      <text:p text:style-name="P48">（ランドマーク。私が一過を得ることはない。）</text:p>
      <text:p text:style-name="P48">あなたがリザーブのカード1枚を消耗した時-私は<text:span text:style-name="T28">試練カウンターを1個得る。</text:span></text:p>
      <text:p text:style-name="P53"><text:span text:style-name="T28">私が私の3個目の試練カウンターを得たとき-私を生け贄に捧げる。ドラゴンの影 5/5/5 イリュージョン トークン</text:span><text:span text:style-name="T20">1体を</text:span><text:span text:style-name="T28">対象の探検隊に生成する。カードを1枚引く。</text:span></text:p>
      <text:p text:style-name="P41">私の探検隊が夕方に前進するのに失敗した時-あなたのランドマークに、エアロリス トークン1個を生成する。あなたの両方の探検隊が前進するのに失敗したなら、代わりに2個生成する。（それは「これが生け贄に捧げられたとき-リサプライする。」と「［消耗］,［1］:これを生け贄に捧げる。」を持つパーマネントである。）</text:p>
      <text:p text:style-name="P41">[両面]私は<text:span text:style-name="T1">アンカー</text:span>を得る。(休息時、私はリザーブに送られず、代わりにアンカーを失う。)</text:p>
      <text:p text:style-name="P41">キャラクター1体が、私の相対している探検隊に加わった時-私は1ブーストを得る。(ブーストは+1/+1/+1カウンターである。探検隊を離れるとき、ブーストはなくなる。)</text:p>
      <text:p text:style-name="P41">&lt;サポート&gt;<text:span text:style-name="T42">[捨て札]:このターン、あなたが次にプレイするキャラクターは1ブーストを得る。(ブーストは+1/+1/+1カウンターである。探検隊を離れるとき、ブーストはなくなる。)</text:span></text:p>
      <text:p text:style-name="P53">[両面]あなたが2つ以上植物をコントロールしているなら、私は2ブーストを得る。（ブーストは+1/+1/+1カウンターである。探検隊を離れるとき、ブーストはなくなる。）</text:p>
      <text:p text:style-name="P53">私がプレイされようとしている探検隊にキャラクターがいないなら、私のコストは<text:span text:style-name="T42">[2]減る。</text:span></text:p>
      <text:p text:style-name="P53">私の探検隊に他のキャラクター1体が加わるたび-それを生け贄に捧げる。</text:p>
      <text:p text:style-name="P53">私が<text:span text:style-name="T1">睡眠</text:span>を得た時-私は1ブーストを得る。（夕方、私のスタッツを無視する。休息時、それはリザーブに送られず、代わりに睡眠を失う。）（下線の引かれている状態は同一のものを重複して得ることができない。）</text:p>
      <text:p text:style-name="P21"><text:span text:style-name="T1">一過</text:span>（私がリザーブに送られるなら、代わりに捨て札にする。）</text:p>
      <text:p text:style-name="P21">合計で山が4以下である望む数の対象のキャラクターをリザーブに送る。</text:p>
      <text:p text:style-name="P9">＜サポート＞<text:span text:style-name="T27">[</text:span>捨て札<text:span text:style-name="T27">]:対象の探検隊にオーディスの新兵 1/1/1 兵士 トークン1体を生成する。</text:span></text:p>
      <text:p text:style-name="P44">リザーブの対象のキャラクターは2ブーストを得る。（ブーストは+1/+1/+1カウンターである。探検隊を離れるとき、ブーストはなくなる。）</text:p>
      <text:p text:style-name="P9">一過（私がリザーブに送られるなら、代わりに捨て札にする。）</text:p>
      <text:p text:style-name="P9">あなたがコントロールしているキャラクターはそれぞれ<text:span text:style-name="T43">1ブーストを得る。（ブーストは+1/+1/+1カウンターである。探検隊を離れるとき、ブーストはなくなる。）</text:span></text:p>
      <text:p text:style-name="P9">カードを3枚引く。</text:p>
      <text:p text:style-name="P9">私が<text:span text:style-name="T1">ブースト中</text:span>なら、私は永遠である。（私は休息時にリザーブに送られない。）</text:p>
      <text:p text:style-name="P9">[両面]私は私の探検隊の他のキャラクター1体につき1ブーストを得る。その後、それらをすべてリザーブに送る。（ブーストは+1/+1/+1カウンターである。探検隊を離れるとき、ブーストはなくなる。）</text:p>
      <text:p text:style-name="P9">夜に-私は1ブーストを失う。</text:p>
      <text:p text:style-name="P9">[両面]あなたはカードを1枚引くために、あなたのリザーブのカード1枚を捨て札にしてもよい。</text:p>
      <text:p text:style-name="P9">[両面]あなたが<text:span text:style-name="T1">一過</text:span>であるキャラクターをコントロールしているなら、私は1ブーストを得る。(ブーストは+1/+1/+1カウンターである。探検隊を離れるとき、ブーストはなくなる。)</text:p>
      <text:p text:style-name="P9">[ウラ]あなたはリザーブの対象のカードを消耗してよい。（それは消耗している限り、サポート能力を失い、プレイできない。）</text:p>
      <text:p text:style-name="P9">&lt;サポート&gt;<text:span text:style-name="T44">[捨て札]:</text:span>このターン、あなたが次にプレイする呪文は<text:span text:style-name="T1">一過</text:span>を失う。</text:p>
      <text:p text:style-name="P9"><text:span text:style-name="T1">一過</text:span>（私がリザーブに送られるなら、代わりに捨て札にする。）</text:p>
      <text:p text:style-name="P9">対象の探検隊の各キャラクターをリザーブに送る。その後、それらを消耗する。（それは消耗している限り、サポート能力を失い、プレイできない。）</text:p>
      <text:p text:style-name="P9">巨大（私はあなたの両方の探検隊に存在しているとみなす。）</text:p>
      <text:p text:style-name="P9">タフ<text:span text:style-name="T44">X、Xはあなたのヒーローとコンパニオンの探検隊の間にある地域の数に等しい。（それらが隣り合っているなら、Xは0である。対戦相手が私を対象にするなら、[X]を追加で支払う。）</text:span></text:p>
      <text:p text:style-name="P9"><text:span text:style-name="T1">一過</text:span>（私がリザーブに送られるなら、代わりに捨て札にする。）</text:p>
      <text:p text:style-name="P9">最大2つまでの、キャラクターかパーマネントを捨て札にする。</text:p>
      <text:p text:style-name="P9">（ランドマーク。私が一過を得ることはない。）</text:p>
      <text:p text:style-name="P9">昼に-カードを1枚引く。</text:p>
      <text:p text:style-name="P9">[両面]あなたはあなたの手札のカード1枚をあなたのリザーブに置いてもよい。そうしたなら、リザーブの対象のカード1枚を消耗する。（それは消耗している限り、サポート能力を失い、プレイできない。）</text:p>
      <text:p text:style-name="P9">[表]私が私の探検隊にいる唯一のキャラクターであるなら、対象の他の最大1体の手札コスト<text:span text:style-name="T44">[3]以下のキャラクターは</text:span><text:span text:style-name="T8">アンカー</text:span><text:span text:style-name="T44">を得る。(休息時、私はリザーブに送られず、代わりにアンカーを失う。)</text:span></text:p>
      <text:p text:style-name="P9">＜サポート＞<text:span text:style-name="T18">[捨て札]:このターン、次にあなたがプレイするカードのコストは[1]減る。</text:span></text:p>
      <text:p text:style-name="P9">[表]サボタージュする。あなたがこれによってカード1枚を捨て札にしたなら、その持ち主は消耗リサプライする。(あなたのデッキの一番上のカードをあなたのリザーブに置く。それを消耗する。それは消耗している限り、サポート能力を失い、プレイできない。）</text:p>
      <text:p text:style-name="P9">巨大（私はあなたの両方の探検隊に存在しているとみなす。）</text:p>
      <text:p text:style-name="P9">私は場にある時でもない時でも、呪文であるともみなす。</text:p>
      <text:p text:style-name="P9">&lt;サポート&gt;<text:span text:style-name="T44">[捨て札]:</text:span>このターン、あなたが次にプレイする呪文は<text:span text:style-name="T1">一過</text:span>を失う。</text:p>
      <text:p text:style-name="P9">[両面]あなたが1つ以上のランドマークをコントロールしているなら、私は1ブーストを得る。(ブーストは+1/+1/+1カウンターである。探検隊を離れるとき、ブーストはなくなる。)</text:p>
      <text:p text:style-name="P48">（ランドマーク。私が一過を得ることはない。）</text:p>
      <text:p text:style-name="P48">あなたがコントロールするキャラクター1体が<text:span text:style-name="T1">一過</text:span>を得た時-私は<text:span text:style-name="T28">試練カウンターを1個得る。</text:span></text:p>
      <text:p text:style-name="P21">私が私の3個目の試練カウンターを得たとき-私を生け贄に捧げる。ドラゴンの影 5/5/5 イリュージョン トークン<text:span text:style-name="T20">1体を</text:span>対象の探検隊に生成する。その後、あなたのコントロールしている各キャラクターは<text:span text:style-name="T29">1ブーストを得る。(ブーストは+1/+1/+1カウンターである。探検隊を離れるとき、ブーストはなくなる。)</text:span></text:p>
      <text:p text:style-name="P21">1つを選ぶ：</text:p>
      <text:p text:style-name="P21">・対象の探検隊にブラスバグ 2/2/2 ロボット トークン<text:span text:style-name="T29">1体を生成する。</text:span></text:p>
      <text:p text:style-name="P21">・あなたがコントロールしている対象のパーマネントの[両面]能力を起動する。</text:p>
      <text:p text:style-name="P21">・対象の手札コスト[3]以下のパーマネントを捨て札にする。</text:p>
      <text:p text:style-name="P53">（ランドマーク。私が一過を得ることはない。）</text:p>
      <text:p text:style-name="P53">あなたが最初にパスした時-対象のプレイヤーのランドマークにエアロリス トークンを1個生成する。（それは「これが生け贄に捧げられたとき-リサプライする。」と「[消耗],[1]:これを生け贄に捧げる。」を持つパーマネントである。）</text:p>
      <text:p text:style-name="P53">[ウラ]<text:span text:style-name="T28">対象の探検隊にブラスバグ 2/2/2 ロボット トークン</text:span><text:span text:style-name="T29">1体を生成する。</text:span></text:p>
      <text:p text:style-name="P53">クールダウン（私が私の効果の解決後にリザーブに置かれるなら、私を消耗する。それは消耗している限り、サポート能力を失い、プレイできない。）</text:p>
      <text:p text:style-name="P53">あなたのリザーブの他のカード１枚を捨て札にする。そうしたなら、対象のキャラクターは<text:span text:style-name="T29">2ブーストを得る。(ブーストは+1/+1/+1カウンターである。探検隊を離れるとき、ブーストはなくなる。)</text:span></text:p>
      <text:p text:style-name="P53"><text:span text:style-name="T1">一過</text:span>（私がリザーブに送られるなら、代わりに捨て札にする。）</text:p>
      <text:p text:style-name="P53">最大3対までの対象のトークンキャラクターは亡命する。（それはコントローラーを変更し、それの相対している探検隊に加わる。）</text:p>
      <text:p text:style-name="P21">[ウラ]対象の探検隊にブラスバグ 2/2/2 ロボット トークン<text:span text:style-name="T29">1体を生成する。</text:span></text:p>
      <text:p text:style-name="P54"><text:span text:style-name="T1">一過</text:span>（私がリザーブに送られるなら、代わりに捨て札にする。）</text:p>
      <text:p text:style-name="P54">サボタージュし、リサプライする。（リザーブのカード最大1枚を対象とし、それを捨て札にする。）（あなたのデッキの一番上のカードをあなたのリザーブに置く。）</text:p>
      <text:p text:style-name="P54">[ウラ]あなたはあなたの手札のカード1枚をあなたのリザーブに置いてもよい。それが呪文なら、カードを1枚引く。</text:p>
      <text:p text:style-name="P54"><text:soft-page-break/>（ランドマーク。私が一過を得ることはない。）</text:p>
      <text:p text:style-name="P54">あなたのキャラクターは「[ウラ]私は1ブーストを得る。」を持つ。</text:p>
      <text:p text:style-name="P9">私があなたの手札からリザーブに置かれたとき-あなたは私を無料でプレイしてもよい。そうしたなら私は<text:span text:style-name="T1">睡眠</text:span>を得る。（夕方、私のスタッツを無視する。休息時、それはリザーブに送られず、代わりに睡眠を失う。）</text:p>
      <text:p text:style-name="P9">対象のキャラクターは<text:span text:style-name="T1">睡眠</text:span>を得る。（夕方、私のスタッツを無視する。休息時、それはリザーブに送られず、代わりに睡眠を失う。）</text:p>
      <text:p text:style-name="P9">[表]あなたがトークンをコントロールしているならサボタージュする。(リザーブのカード最大1枚を対象とし、それを捨て札にする。)</text:p>
      <text:p text:style-name="P9">[表]あなたは対象の手札コスト<text:span text:style-name="T45">[X]以下のキャラクターをリザーブに送ってもよい。Xはあなたがコントロールしているキャラクターの数に等しい。<text:line-break/>防衛（私の探検隊は夕方に前進できない。）</text:span></text:p>
      <text:p text:style-name="P9">&lt;サポート&gt;<text:span text:style-name="T45">[捨て札]:対象の探検隊は上昇する。（休息時まで、それは対戦相手の探検隊とその地域の地形で同点であったとしても前進できる。）</text:span></text:p>
      <text:p text:style-name="P9">私のコストはあなたの上昇している探検隊1つにつき<text:span text:style-name="T45">[1]減る。</text:span></text:p>
      <text:p text:style-name="P9">巨大（私はあなたの両方の探検隊に存在しているとみなす。）</text:p>
      <text:p text:style-name="P9"><text:span text:style-name="T1">一過</text:span>（私がリザーブに送られるなら、代わりに捨て札にする。）</text:p>
      <text:p text:style-name="P53">あなたのコントロールするすべてのキャラクターの探検隊を入れ替える。</text:p>
      <text:p text:style-name="P53">対象の探検隊にマナ・モス 2/2/2 イリュージョン トークン<text:span text:style-name="T45">1体を生成する。</text:span></text:p>
      <text:p text:style-name="P53">カードを1枚引く。</text:p>
      <text:p text:style-name="P53">スカウト<text:span text:style-name="T45">[1]（あなたは私を手札から[1]でプレイしてもよい。そうしたなら「[表]私をリザーブに送る。」を持つ。）</text:span></text:p>
      <text:p text:style-name="P53">[両面]<text:span text:style-name="T15">あなたのリザーブの全てのカードを非消耗にする。</text:span></text:p>
      <text:p text:style-name="P53">(ランドマーク。私が一過を得ることはない。)</text:p>
      <text:p text:style-name="P55">[消耗]:あなたのデッキの一番上のカードを公開する。それが呪文なら、それを引く。（そうでないなら、それをデッキの一番上に置いたままにする。）</text:p>
      <text:p text:style-name="P9">（私を探検隊にプレイする。私の探検隊が前進したなら、休息時に私をリザーブに送る。）</text:p>
      <text:p text:style-name="P9">[両面]オーディスの新兵 1/1/1 兵士 トークンを1体私の探検隊に生成する。</text:p>
      <text:p text:style-name="P9">防衛を持つキャラクターは私の探検隊の前進を妨げない。</text:p>
      <text:p text:style-name="P9">[両面]私の探検隊が遅れているなら、私は<text:span text:style-name="T46">1ブーストを得る。（ブーストは+1/+1/+1カウンターである。探検隊を離れるとき、ブーストはなくなる。）</text:span></text:p>
      <text:p text:style-name="P21">（私を探検隊にプレイする。私の探検隊が前進したなら、休息時に私をリザーブに送る。）</text:p>
      <text:p text:style-name="P21">[ウラ]リサプライする。(あなたのデッキの一番上のカードをあなたのリザーブに置く。)</text:p>
      <text:p text:style-name="P21">私の探検隊が前進する時-私の探検隊の対象のキャラクターは<text:span text:style-name="T1">一過</text:span>を失う。</text:p>
      <text:p text:style-name="P21">[表]<text:span text:style-name="T46">6面ダイスを1個振る。</text:span></text:p>
      <text:p text:style-name="P21">・<text:span text:style-name="T46">4+ リサプライする。</text:span></text:p>
      <text:p text:style-name="P21">・<text:span text:style-name="T46">1-3 消耗リサプライする。（あなたのデッキの一番上のカードをあなたのリザーブに置く。それを消耗する。それは消耗している限り、サポート能力を失い、プレイできない。）</text:span></text:p>
      <text:p text:style-name="P9">（私を探検隊にプレイする。私の探検隊が前進したなら、休息時に私をリザーブに送る。）</text:p>
      <text:p text:style-name="P9">私の探検隊が前進するなら、前進する代わりに私を捨て札にしてもよい。そうしたなら、カードを2枚引く。</text:p>
      <text:p text:style-name="P9">クールダウン（私が私の効果の解決後にリザーブに置かれるなら、私を消耗する。</text:p>
      <text:p text:style-name="P9">対象の<text:span text:style-name="T47">3を超えるスタッツがないキャラクターをリザーブに送る。</text:span></text:p>
      <text:p text:style-name="P21">&lt;サポート&gt;<text:span text:style-name="T47">[</text:span>捨て札<text:span text:style-name="T47">]:あなたのコントロールする対象のパーマネントの[両面]効果を発動させる。</text:span></text:p>
      <text:p text:style-name="P21">[ウラ]私は<text:span text:style-name="T47">2ブーストを得る。(ブーストは+1/+1/+1カウンターである。探検隊を離れるとき、ブーストはなくなる。)</text:span></text:p>
      <text:p text:style-name="P21">(ランドマーク。私が一過を得ることはない。)</text:p>
      <text:p text:style-name="P56">[消耗]:私はケロンカウンターを2個得る。</text:p>
      <text:p text:style-name="P56">[消耗],私のケロンカウンターを1個支払う:このターン、あなたが次にプレイするキャラクターは1ブーストを得る。(ブーストは+1/+1/+1カウンターである。探検隊を離れるとき、ブーストはなくなる。)</text:p>
      <text:p text:style-name="P56">私が探検隊からリザーブに置かれた時-あなたはあなたのリザーブの他のカード1枚をあなたの手札に戻してもよい。</text:p>
      <text:p text:style-name="P56">あなたは手札コスト[3]以上のパーマネント1つをプレイした時-対象のキャラクターは1ブーストを得る。</text:p>
      <text:p text:style-name="P56">&lt;サポート&gt;[捨て札]:最大1体の対象の手札コスト[3]以下のキャラクターは<text:span text:style-name="T1">アンカー</text:span>を得る。(休息時、私はリザーブに送られず、代わりにアンカーを失う。)</text:p>
      <text:p text:style-name="P56">[ウラ]私は<text:span text:style-name="T1">一過</text:span>を失う。</text:p>
      <text:p text:style-name="P56">[表]対象のキャラクターは<text:span text:style-name="T1">アンカー</text:span>を得る。(休息時、私はリザーブに送られず、代わりにアンカーを失う。)</text:p>
      <text:p text:style-name="P56"><text:span text:style-name="T1">一過</text:span>（私がリザーブに送られるなら、代わりに捨て札にする。）</text:p>
      <text:p text:style-name="P56">2つを選ぶ:</text:p>
      <text:p text:style-name="P56">・対象の手札コスト[2]以下のキャラクターをリザーブに送る。</text:p>
      <text:p text:style-name="P56">・サボタージュする。（リザーブのカード最大1枚を対象とし、それを捨て札にする。）</text:p>
      <text:p text:style-name="P56">・カードを1枚引く。</text:p>
      <text:p text:style-name="P56">[ウラ]この午後にあなたがプレイする次の呪文のコストは[1]減る。</text:p>
      <text:p text:style-name="P56">&lt;サポート&gt;[捨て札]:このターン、あなたが次にプレイする呪文のコストは[1]減る。</text:p>
      <text:p text:style-name="P56">[両面]私の探検隊が遅れているなら、カードを1枚引く。そうでないなら、リサプライする。(あなたのデッキの一番上のカードをあなたのリザーブに置く。)</text:p>
      <text:p text:style-name="P41">[両面]私は<text:span text:style-name="T1">アンカー</text:span>を得る。(休息時、私はリザーブに送られず、代わりにアンカーを失う。)</text:p>
      <text:p text:style-name="P41">キャラクター1体が、私の相対している探検隊に加わった時-私は1ブーストを得る。(ブーストは+1/+1/+1カウンターである。探検隊を離れるとき、ブーストはなくなる。)</text:p>
      <text:p text:style-name="P41">私が探検隊からあなたのリザーブに置かれた時、私が<text:span text:style-name="T47">2つ以上のブーストを持っていたなら-あなたははあなたのリザーブのカード1枚を、あなたのマナ・ゾーンに置いてもよい。（それらは消耗したマナ・オーブである）</text:span></text:p>
      <text:p text:style-name="P41"><text:span text:style-name="T1">一過</text:span>（私がリザーブに送られるなら、代わりに捨て札にする。）</text:p>
      <text:p text:style-name="P41">対象の探検隊は1地域前進する。（夜の終了時までゲームに勝つことはできない。）</text:p>
      <text:p text:style-name="P41">熟練（私がリザーブに行く時、ブーストを失わない。）</text:p>
      <text:p text:style-name="P41">[両面]私は<text:span text:style-name="T47">1ブーストを得る。(ブーストは+1/+1/+1カウンターである。探検隊を離れるとき、ブーストはなくなる。)</text:span></text:p>
      <text:p text:style-name="P41">それぞれのプレイヤーは自分がコントロールしているキャラクターを1体選ぶ。それらは<text:span text:style-name="T1">睡眠</text:span>を得る。(夕方、私のスタッツを無視する。休息時、それはリザーブに送られず、代わりに睡眠を失う。)</text:p>
      <text:p text:style-name="P9">[ウラ]あなたはあなたがコントロールする対象のパーマネントの[両面]能力を起動してもよい。</text:p>
      <text:p text:style-name="P53">[ウラ]対象のキャラクターを捨て札にしてもよい。そうしたなら、そのプレイヤーのコントローラーのランドマークに、エアロリス トークンを1つ生成する。（それは「これが生け贄に捧げられたとき-リサプライする。」と「[消耗],[1]:これを生け贄に捧げる。」を持つパーマネントである。）</text:p>
      <text:p text:style-name="P53">[両面]私は森の探検隊1つにつき<text:span text:style-name="T48">1ブーストを得る。（ブーストは+1/+1/+1カウンターである。探検隊を離れるとき、ブーストはなくなる。）</text:span></text:p>
      <text:p text:style-name="P73">[表]あなたから始めて、各プレイヤーは即座に手札コスト<text:span text:style-name="T40">[3]以下のカードを無料でプレイしてもよい。</text:span></text:p>
      <text:p text:style-name="P73"><text:span text:style-name="T1">一過</text:span>（私がリザーブに送られるなら、代わりに捨て札にする。）</text:p>
      <text:p text:style-name="P73">対象の手札コスト<text:span text:style-name="T49">[X]以下のキャラクター1体をリザーブに送る。Xはあなたのコントロールするキャラクターの数に等しい。</text:span></text:p>
      <text:p text:style-name="P51">カードを1枚引く。</text:p>
      <text:p text:style-name="P51">あなたの両方の探検隊は上昇する。（休息時まで、それは対戦相手の探検隊とその地域の地形で同点であったとしても前進できる。）</text:p>
      <text:p text:style-name="P51">即座に最大2体までの基本コスト[3]以下のキャラクターを無料でプレイする。（リザーブからプレイするならリザーブコスト、そうでないなら手札コストである。）</text:p>
      <text:p text:style-name="P51">[表]対象の対戦相手は消耗リサプライを2回行ってもよい。(あなたのデッキの一番上のカードをあなたのリザーブに置く。それを消耗する。それは消耗している限り、サポート能力を失い、プレイできない。）</text:p>
      <text:p text:style-name="P73"><text:span text:style-name="T1">一過</text:span>（私がリザーブに送られるなら、代わりに捨て札にする。）</text:p>
      <text:p text:style-name="P75">対象の探検隊にオーディスの新兵 1/1/1 兵士 トークン1体を生成する。</text:p>
      <text:p text:style-name="P73">対象の手札コスト<text:span text:style-name="T49">[X]以下のキャラクター1体をリザーブに送る。Xはあなたのコントロールするキャラクターの数に等しい。</text:span></text:p>
      <text:p text:style-name="P51">[両面]対象のキャラクター1体は<text:span text:style-name="T1">アンカー</text:span>を得る。(休息時、私はリザーブに送られず、代わりにアンカーを失う。)</text:p>
      <text:p text:style-name="P53">私が森にいるなら、私は永遠である。（私は休息時にリザーブに送られない。）</text:p>
      <text:p text:style-name="P9"><text:span text:style-name="T1">一過</text:span>（私がリザーブに送られるなら、代わりに捨て札にする。）</text:p>
      <text:p text:style-name="P9">即座に[5]コスト減らしてキャラクターを1体プレイする。それは<text:span text:style-name="T1">一過</text:span>を得る。</text:p>
      <text:p text:style-name="P9">[表]あなたは対象のパーマネントを捨て札にしてもよい。そうしないなら、私は<text:span text:style-name="T50">2ブーストを得る。(ブーストは+1/+1/+1カウンターである。探検隊を離れるとき、ブーストはなくなる。)</text:span></text:p>
      <text:p text:style-name="P9">[両面]あなたが2つ以上のランドマークをコントロールしているなら、私は<text:span text:style-name="T51">2ブーストを得る。(ブーストは+1/+1/+1カウンターである。探検隊を離れるとき、ブーストはなくなる。)</text:span></text:p>
      <text:p text:style-name="P9">[ウラ]<text:span text:style-name="T52">エアロリス トークン1個をあなたのランドマークに生成する。（それは「これが生け贄に捧げられたとき-リサプライする。」と「[消耗],[1]:これを生け贄に捧げる。」を持つパーマネントである。）</text:span></text:p>
      <text:p text:style-name="P57">対戦相手のリザーブのカードは、カウンターを得ることができない。（<text:span text:style-name="T1">状態</text:span>はカウンターではない。）</text:p>
      <text:p text:style-name="P57">[表]あなたが先手なら、対象のプレイヤーが先手になる。</text:p>
      <text:p text:style-name="P9">巨大（私はあなたの両方の探検隊に存在しているとみなす。）</text:p>
      <text:p text:style-name="P9">タフ<text:span text:style-name="T44">X、Xはあなたのヒーローとコンパニオンの探検隊の間にある地域の数に等しい。（それらが隣り合っているなら、Xは0である。対戦相手が私を対象にするなら、[X]を追加で支払う。）</text:span></text:p>
      <text:p text:style-name="P9">あなたがコントロールする他の各キャラクターは1ブーストを得る。(ブーストは+1/+1/+1カウンターである。探検隊を離れるとき、ブーストはなくなる。)</text:p>
      <text:p text:style-name="P9">巨大（私はあなたの両方の探検隊に存在しているとみなす。）</text:p>
      <text:p text:style-name="P9">[両面]あなたのリザーブのカードの枚数が対象の対戦相手よりも少ないなら、カードを1枚引く。</text:p>
      <text:p text:style-name="P9">巨大（私はあなたの両方の探検隊に存在しているとみなす。）</text:p>
      <text:p text:style-name="P9">[両面]キャラクター2体を生け贄に捧げる。</text:p>
      <text:p text:style-name="P9">全ての地域は海であり、そのほかの地形を失う。</text:p>
      <text:p text:style-name="P9">スカウト<text:span text:style-name="T53">[4]（あなたは私を手札から[4]でプレイしてもよい。そうしたなら「[表]私をリザーブに送る。」を持つ。）</text:span></text:p>
      <text:p text:style-name="P57">[表]対象のキャラクターをリザーブに送ってもよい。</text:p>
      <text:p text:style-name="P57">タフ1（対戦相手が私を対象にするなら、[1]を追加で支払う。）</text:p>
      <text:p text:style-name="P57">[両面]私はアンカーを得る。(休息時、私はリザーブに送られず、代わりにアンカーを失う。)</text:p>
      <text:p text:style-name="P57">[両面]あなたのリザーブの各動物/Animalと探検家/Adventurerは1ブーストを得る。(ブーストは+1/+1/+1カウンターである。探検隊を離れるとき、ブーストはなくなる。)</text:p>
      <text:p text:style-name="P57">私と相対しているキャラクターの[両面]、[表]、[ウラ]能力は起動できない。</text:p>
      <text:p text:style-name="P9">スカウト[1]（あなたは私を手札から[1]でプレイしてもよい。そうしたなら「[表]私をリザーブに送る。」を持つ。）</text:p>
      <text:p text:style-name="P9">[両面]あなたのリザーブの全てのカードを非消耗にする。</text:p>
      <text:p text:style-name="P9">[表]あなたは<text:span text:style-name="T54">[1]を支払ってもよい。そうしたなら</text:span><text:span text:style-name="T9">アンカー</text:span><text:span text:style-name="T54">を得る。（休息時、私はリザーブに送られず、代わりにアンカーを失う。）</text:span></text:p>
      <text:p text:style-name="P9">[ウラ]あなたはあなたの手札のカード1枚をリザーブに置いてもい。そうしたなら、リサプライする。（あなたのデッキの一番上のカードをあなたのリザーブに置く。）</text:p>
      <text:p text:style-name="P9">&lt;サポート&gt;<text:span text:style-name="T54">[捨て札]最大1体のキャラクターは</text:span><text:span text:style-name="T9">一過</text:span><text:span text:style-name="T54">を得る。（私がリザーブに送られるなら、代わりに捨て札にする。）</text:span></text:p>
      <text:p text:style-name="P9">[両面]あなたのリザーブに2枚以上のカードがあるなら、私の探検隊にブラスバグ 2/2/2 ロボット トークン<text:span text:style-name="T54">1体を生成する。</text:span></text:p>
      <text:p text:style-name="P9">[表]私をリザーブに送る。</text:p>
      <text:p text:style-name="P9">&lt;サポート&gt;<text:span text:style-name="T54">[捨て札]あなたのコントロールする対象のパーマネントの[両面]能力を起動する。</text:span></text:p>
      <text:p text:style-name="P9">[両面]私が上昇した探検隊にいるなら、私は1ブーストを得る。そうでないなら、私の探検隊は上昇する。（休息時まで、それは対戦相手の探検隊とその地域の地形で同点であったとしても前進できる。）</text:p>
      <text:p text:style-name="P9">[両面]相対しているキャラクター1体を対象とする。私はそれの各サブタイプと<text:span text:style-name="T55">Xブーストを得る。Xはそれの最大のスタッツである。</text:span>（ブーストは+1/+1/+1カウンターである。探検隊を離れるとき、ブーストはなくなる。）</text:p>
      <text:p text:style-name="P49">（私を探検隊にプレイする。私の探検隊が前進したなら、休息時に私をリザーブに送る。）</text:p>
      <text:p text:style-name="P49">私の探検隊のキャラクターはそれぞれ森、山、海について、それらのうち最大のスタッツを持つ。</text:p>
      <text:p text:style-name="P73">スカウト<text:span text:style-name="T41">[1]（あなたは私を手札から[1]でプレイしてもよい。そうしたなら「[表]私をリザーブに送る。」を持つ。）</text:span></text:p>
      <text:p text:style-name="P73">[両面]あなたは他の対象のキャラクターに<text:span text:style-name="T1">一過</text:span>を失わせるとともに<text:span text:style-name="T41">1ブーストを得させてもよい。(ブーストは+1/+1/+1カウンターである。探検隊を離れるとき、ブーストはなくなる。)</text:span></text:p>
      <text:p text:style-name="P38">（ランドマーク。私が一過を得ることはない。）</text:p>
      <text:p text:style-name="P38">あなたが官僚/<text:span text:style-name="T55">Bureaucrat1体をプレイするたび-</text:span>6面ダイスを振り、あなたのデッキの一番上のカードも公開する。</text:p>
      <text:p text:style-name="P38">あなたがこれによってカードを公開したなら-そのカードの手札コストがダイスの出目に等しいなら、それを引く。</text:p>
      <text:p text:style-name="P38">あなたのコントロールするキャラクターが<text:span text:style-name="T1">アンカー</text:span>を得た時-私は<text:span text:style-name="T55">1ブーストを得る。（ブーストは+1/+1/+1カウンターである。探検隊を離れるとき、ブーストはなくなる。）</text:span></text:p>
      <text:p text:style-name="P38">カードを2枚引く。</text:p>
      <text:p text:style-name="P53">（ランドマーク。私が一過を得ることはない。）</text:p>
      <text:p text:style-name="P53">[両面]私はケロンカウンターを3個得る。</text:p>
      <text:p text:style-name="P53">昼に-あなたは[1]を支払うとともに、私のケロンカウンターを1個支払ってもよい。そうしたなら、ブラスバグ 2/2/2 ロボット トークン1体を、対象の探検隊に生成する。</text:p>
      <text:p text:style-name="P53">[表]各プレイヤーはそれぞれデッキの一番上のカードをマナ・ゾーンに置く。（それらは消耗したマナ・オーブである）</text:p>
      <text:p text:style-name="P9">[表]リザーブの対象のカード1枚を消耗する。（それは消耗している限り、サポート能力を失い、プレイできない。）</text:p>
      <text:p text:style-name="P9">昼に-リサプライする。（あなたのデッキの一番上のカードをあなたのリザーブに置く。）（この能力を使うには、<text:span text:style-name="T1">アンカー</text:span>や<text:span text:style-name="T1">睡眠</text:span><text:span text:style-name="T16">が</text:span>必要。）</text:p>
      <text:p text:style-name="P9">防衛（私の探検隊は夕方に前進できない。）</text:p>
      <text:p text:style-name="P9">私の探検隊が（相対する探検隊より）遅れているなら、防衛を持つキャラクターは私の探検隊の前進を妨げない。</text:p>
      <text:p text:style-name="P9">対象の<text:span text:style-name="T1">一過</text:span>を持つキャラクターは<text:span text:style-name="T1">アンカー</text:span>を持つ。（休息時、私はリザーブに送られず、代わりにアンカーを失う。）</text:p>
      <text:p text:style-name="P9">熟練（私がリザーブに行く時、ブーストを失わない。）</text:p>
      <text:p text:style-name="P9">夜に-あなたはあなたのリザーブやランドマークにあるカード1つからカウンター1つを支払ってもよい。そうしたなら、休息後サボタージュを行う。（リザーブのカード最大1枚を対象とし、それを捨て札にする。）</text:p>
      <text:p text:style-name="P9"><text:soft-page-break/>[表]サボタージュする。（リザーブのカード最大1枚を対象とし、それを捨て札にする。）</text:p>
      <text:p text:style-name="P9">クールダウン（私が私の効果の解決後にリザーブに置かれるなら、私を消耗する。それは消耗している限り、サポート能力を失い、プレイできない。）</text:p>
      <text:p text:style-name="P9">あなたのリザーブの対象のキャラクター1体と、あなたの手札のカード1枚を交換する。</text:p>
      <text:p text:style-name="P41">[ウラ]あなたはマナ・オーブ2つを非消耗にするために、私のブーストを1つ支払ってもよい。</text:p>
      <text:p text:style-name="P53"><text:span text:style-name="T26">＜サポート＞</text:span><text:span text:style-name="T15">[無限]あなたが他のキャラクター</text:span><text:span text:style-name="T56">1体をプレイした時-</text:span>私は3ブーストを最大として1ブーストを得る。（ブーストは+1/+1/+1カウンターである。探検隊を離れるとき、ブーストはなくなる。）</text:p>
      <text:p text:style-name="P58"><text:span text:style-name="T1">一過</text:span>（私がリザーブに送られるなら、代わりに捨て札にする。）</text:p>
      <text:p text:style-name="P58">対象のキャラクターかパーマネントを捨て札にする。</text:p>
      <text:p text:style-name="P58"><text:span text:style-name="T1">一過</text:span>（私がリザーブに送られるなら、代わりに捨て札にする。）</text:p>
      <text:p text:style-name="P58">キャラクター1体を生け贄に捧げる。そうしたなら、カードを2枚引く。</text:p>
      <text:p text:style-name="P9">[両面]私が上昇した探検隊にいるなら、私は1ブーストを得る。そうでないなら、私の探検隊は上昇する。（休息時まで、それは対戦相手の探検隊とその地域の地形で同点であったとしても前進できる。）</text:p>
      <text:p text:style-name="P9">（ランドマーク。私が一過を得ることはない。）</text:p>
      <text:p text:style-name="P9">[両面]私はケロンカウンターを2個得る。</text:p>
      <text:p text:style-name="P59">[消耗],私のケロンカウンターを1個支払う:対象のキャラクターは<text:span text:style-name="T1">一過</text:span>を失う。</text:p>
      <text:p text:style-name="P59">[両面]あなたは[1]を支払ってもよい。そうしたなら私は1ブーストを得て、私の探検隊は上昇する。(休息時まで、それは対戦相手の探検隊とその地域の地形で同点であったとしても前進できる。)</text:p>
      <text:p text:style-name="P59">&lt;サポート&gt;[捨て札]:対象の探検隊は上昇する。</text:p>
      <text:p text:style-name="P59">[ウラ]あなたはあなたのデッキの一番上のカードをあなたのマナ・ゾーンに消耗して置くためにラッシュしてもよい。（ラッシュするには、他のカード1枚をすぐにプレイする。）</text:p>
      <text:p text:style-name="P59">巨大（私はあなたの両方の探検隊に存在しているとみなす。）</text:p>
      <text:p text:style-name="P59">[両面]対象の探検隊にウーリーバック 1/1/1 動物 トークン1体を生成する。</text:p>
      <text:p text:style-name="P59">[両面]私は私が相対している探検隊のキャラクター1体につき1ブーストを得る。(ブーストは+1/+1/+1カウンターである。探検隊を離れるとき、ブーストはなくなる。)</text:p>
      <text:p text:style-name="P59">[両面]私は<text:span text:style-name="T1">一過</text:span>を得る。（私がリザーブに送られるなら、代わりに捨て札にする。）</text:p>
      <text:p text:style-name="P59">[両面]この午後にあなたが次にプレイするパーマネントのコストは[4]減る。</text:p>
      <text:p text:style-name="P21"><text:span text:style-name="T1">一過</text:span>（私がリザーブに送られるなら、代わりに捨て札にする。）</text:p>
      <text:p text:style-name="P21">いずれかのリザーブにある、対象のリザーブコストが<text:span text:style-name="T20">[2]以下のキャラクター1つを選ぶ。それを無料でプレイする。（それをあなたの探検隊のうちの1つに出す。）</text:span></text:p>
      <text:p text:style-name="P21"><text:span text:style-name="T1">一過</text:span>（私がリザーブに送られるなら、代わりに捨て札にする。）</text:p>
      <text:p text:style-name="P21">キャラクター1体を対象とする。6面ダイスを1個振る。</text:p>
      <text:p text:style-name="P21">・4+ それは<text:span text:style-name="T1">アンカー</text:span>を得る。（休息時、私はリザーブに送られず、代わりにアンカーを失う。）</text:p>
      <text:p text:style-name="P21">・<text:span text:style-name="T57">1-3</text:span> それは<text:span text:style-name="T1">睡眠</text:span>を得る。（夕方、私のスタッツを無視する。休息時、それはリザーブに送られず、代わりに睡眠を失う。）</text:p>
      <text:p text:style-name="P21">リザーブに消耗したカードが2枚以上あるなら、私のコストは<text:span text:style-name="T57">[1]減る。</text:span></text:p>
      <text:p text:style-name="P9">マナ・モス 2/2/2 イリュージョン トークン<text:span text:style-name="T39">3体を、</text:span>望む数の対象の探検隊に望むように割り振って生成する。</text:p>
      <text:p text:style-name="P9">（私を探検隊にプレイする。私の探検隊が前進したなら、休息時に私をリザーブに送る。）</text:p>
      <text:p text:style-name="P9">[両面]対象のキャラクターは<text:span text:style-name="T57">1ブーストを得る。(ブーストは+1/+1/+1カウンターである。探検隊を離れるとき、ブーストはなくなる。)</text:span></text:p>
      <text:p text:style-name="P9">私の探検隊のキャラクターは熟練を持つ。（私がリザーブに行く時、ブーストを失わない。）</text:p>
      <text:p text:style-name="P54">[ウラ]あなたはカードを1枚引くためにあなたの手札のカード1枚をあなたのリザーブに置いてもよい。</text:p>
      <text:p text:style-name="P54">（ランドマーク。私が一過を得ることはない。）</text:p>
      <text:p text:style-name="P54">[両面]エアロリス トークン<text:span text:style-name="T58">1個をあなたのランドマークに生成する。（それは「これが生け贄に捧げられたとき-リサプライする。」と「[消耗],[1]:これを生け贄に捧げる。」を持つパーマネントである。）</text:span></text:p>
      <text:p text:style-name="P54"><text:span text:style-name="T58">[</text:span>消耗<text:span text:style-name="T58">]</text:span>,<text:span text:style-name="T58">[1],パーマネント1つを生け贄に捧げる:対象の探検隊にブラスバグ 2/2/2 ロボット トークン1体を生成する。</text:span></text:p>
      <text:p text:style-name="P41">私の探検隊が夕方に前進するのに失敗した時-休息後にサボタージュする。(リザーブのカード最大1枚を対象とし、それを捨て札にする。)</text:p>
      <text:p text:style-name="P41">[ウラ]あなたの手札が空なら、カードを1枚引く。</text:p>
      <text:p text:style-name="P41">&lt;サポート&gt;<text:span text:style-name="T58">[無限]2ブーストを上限として私は1ブーストを得る。</text:span></text:p>
      <text:p text:style-name="P41">[両面]私が<text:span text:style-name="T1">アンカー</text:span>を得るためにあなたは<text:span text:style-name="T58">[1]を支払ってもよい。（休息時、私はリザーブに送られず、代わりにアンカーを失う。）</text:span></text:p>
      <text:p text:style-name="P41">昼に-<text:span text:style-name="T58">リサプライする。（あなたのデッキの一番上のカードをあなたのリザーブに置く。）</text:span></text:p>
      <text:p text:style-name="P41">[両面]私の探検隊にオーディスの新兵 1/1/1 兵士 トークン<text:span text:style-name="T59">1体を生成する。</text:span></text:p>
      <text:p text:style-name="P41">あなたのリザーブのキャラクターが1つ以上のブーストを得た時-対象のキャラクターは1ブーストを得る。</text:p>
      <text:p text:style-name="P41">（ランドマーク。私が一過を得ることはない。）</text:p>
      <text:p text:style-name="P41">昼に-リサプライする。（あなたのデッキの一番上のカードをあなたのリザーブに置く。）</text:p>
      <text:p text:style-name="P41">[表]私が1つの地形の地域にいるなら、サボタージュする。そうでないなら、私の探検隊は上昇する。（リザーブのカード最大1枚を対象とし、それを捨て札にする。）（休息時まで、それは対戦相手の探検隊とその地域の地形で同点であったとしても前進できる。）</text:p>
      <text:p text:style-name="P41">[両面]私は<text:span text:style-name="T1">アンカー</text:span>を得る。（休息時、私はリザーブに送られず、代わりにアンカーを失う。）</text:p>
      <text:p text:style-name="P41">昼に-あなたはあなたの手札のカード1枚をリザーブに置いてもよい。そうしたなら、私は<text:span text:style-name="T59">1ブーストを得る。（ブーストは+1/+1/+1カウンターである。探検隊を離れるとき、ブーストはなくなる。）</text:span></text:p>
      <text:p text:style-name="P41">&lt;サポート&gt;<text:span text:style-name="T59">[捨て札]:最大1体までの対象のキャラクターは</text:span><text:span text:style-name="T10">一過</text:span><text:span text:style-name="T59">を得る。（私がリザーブに送られるなら、代わりに捨て札にする。）</text:span></text:p>
      <text:p text:style-name="P53">＜サポート＞<text:span text:style-name="T15">[無限]あなたが他のキャラクター</text:span><text:span text:style-name="T56">1体をプレイした時-</text:span>私は3ブーストを最大として1ブーストを得る。（ブーストは+1/+1/+1カウンターである。探検隊を離れるとき、ブーストはなくなる。）</text:p>
      <text:p text:style-name="P53">[表]対象の対戦相手は自分の手札からカードを1枚捨てる。</text:p>
      <text:p text:style-name="P53">[ウラ]あなたは対象のキャラクターに<text:span text:style-name="T1">睡眠</text:span>を得させるために私のブースト1つを支払ってもよい。</text:p>
      <text:p text:style-name="P9">＜サポート＞[無限]他のキャラクターが1体あなたの探検隊に加わるたび-私は2ブーストを最大として1ブーストを得る。</text:p>
      <text:p text:style-name="P53">スカウト<text:span text:style-name="T59">[3]（あなたは私を手札から[3]でプレイしてもよい。そうしたなら「[表]私をリザーブに送る。」を持つ。）</text:span></text:p>
      <text:p text:style-name="P53">[両面]対象の手札コスト<text:span text:style-name="T59">[3]以下のキャラクターは</text:span><text:span text:style-name="T10">アンカー</text:span><text:span text:style-name="T59">を得る。（休息時、私はリザーブに送られず、代わりにアンカーを失う。）</text:span></text:p>
      <text:p text:style-name="P34">タフ1（対戦相手が私を対象にするなら、[1]を追加で支払う。）</text:p>
      <text:p text:style-name="P34">私の探検隊が前進した時-エアロリストークン1つをあなたのランドマークに生成する。（それは「これが生け贄に捧げられたとき-リサプライする。」と「[消耗],[1]:これを生け贄に捧げる。」を持つパーマネンである。）</text:p>
      <text:p text:style-name="P34">[両面]あなたのコントロールする各パーマネントについて、あなたはそれの[両面]能力を起動してもよい。</text:p>
      <text:p text:style-name="P34">[ウラ]私は2ブーストを得て、<text:span text:style-name="T1">一過</text:span>を失う。（私がリザーブに送られるなら、代わりに捨て札にする。）</text:p>
      <text:p text:style-name="P73">&lt;サポート&gt;<text:span text:style-name="T40">[捨て札]:あなたがコントロールする対象の手札コスト[4]以下のキャラクターは</text:span><text:span text:style-name="T7">睡眠</text:span><text:span text:style-name="T40">を得る。(夕方、私のスタッツを無視する。休息時、それはリザーブに送られず、代わりに睡眠を失う。)</text:span></text:p>
      <text:p text:style-name="P76">（ランドマーク。私が一過を得ることはない。）</text:p>
      <text:p text:style-name="P76">あなたが基本コストが[4]以上であるカード1枚をプレイした時-あなたは対象のキャラクター1体に1ブーストを得させてもよい。（リザーブからプレイするならリザーブコスト、そうでないなら手札コストである。）（ブーストは+1/+1/+1カウンターである。探検隊を離れるとき、ブーストはなくなる。）</text:p>
      <text:p text:style-name="P73">[両面]6面ダイスを1個振る。<text:span text:style-name="T41">4+なら、私は2ブーストを得る。1-3なら、私は1ブーストを得る。（ブーストは+1/+1/+1カウンターである。探検隊を離れるとき、ブーストはなくなる。）</text:span></text:p>
      <text:p text:style-name="P77">[両面]私はあなたのマナ・ゾーンにあるマナ・オーブ1つにつき1ブーストを得る。(ブーストは+1/+1/+1カウンターである。探検隊を離れるとき、ブーストはなくなる。)</text:p>
      <text:p text:style-name="P77">ロボット1つかトークン1つがあなたの探検隊に加わった時-私がブーストを持っていないなら、私は1ブーストを得て、エアロリス トークン1個をあなたのランドマークに生成する。(それは「これが生け贄に捧げられたとき-リサプライする。」と「[消耗],[1]:これを生け贄に捧げる。」を持つパーマネントである。）</text:p>
      <text:p text:style-name="P77">&lt;サポート&gt;[捨て札]:エアロリス トークン1個をあなたのランドマークに生成する。</text:p>
      <text:p text:style-name="P77">一過（私がリザーブに送られるなら、代わりに捨て札にする。）</text:p>
      <text:p text:style-name="P77">対象の手札コスト[4]以下の、キャラクターかパーマネント1つを持ち主の手札に戻す。</text:p>
      <text:p text:style-name="P73">[両面]6面ダイスを1個振る。<text:span text:style-name="T41">4+なら、私は</text:span><text:span text:style-name="T60">3</text:span><text:span text:style-name="T41">ブーストを得る。1-3なら、私は1ブーストを得る。（ブーストは+1/+1/+1カウンターである。探検隊を離れるとき、ブーストはなくなる。）</text:span></text:p>
      <text:p text:style-name="P77">（ランドマーク。私が一過を得ることはない。）</text:p>
      <text:p text:style-name="P77">[両面]サボタージュする。（リザーブのカード最大1枚を対象とし、それを捨て札にする。）</text:p>
      <text:p text:style-name="P77">私の探検隊が夕方に前進するのに失敗した時-カードを1枚引く。</text:p>
      <text:p text:style-name="P77">「異議あり！」</text:p>
      <text:p text:style-name="P77">[表]あなたはあなたの手札から手札コスト[4]以上である呪文1枚を公開してもよい。そうしたならサボタージュする。（リザーブのカード最大1枚を対象とし、それを捨て札にする。）そうしないなら、リザーブの対象のカードを消耗する。（それは消耗している限り、サポート能力を失い、プレイできない。）</text:p>
      <text:p text:style-name="P77">&lt;サポート&gt;[捨て札]:エアロリス トークン1個をあなたのランドマークに生成する。(それは「これが生け贄に捧げられたとき-リサプライする。」と「[消耗],[1]:これを生け贄に捧げる。」を持つパーマネントである。）</text:p>
      <text:p text:style-name="P77">[両面]あなたはあなたの手札のカード1枚をリザーブに置いてもよい。そうしたなら、私は森の探検隊1つにつき1ブーストを得る。（ブーストは+1/+1/+1カウンターである。探検隊を離れるとき、ブーストはなくなる。）</text:p>
      <text:p text:style-name="P77">[両面]あなたは[1]を支払ってもよい。そうしたなら私は1ブーストを得る。(ブーストは+1/+1/+1カウンターである。探検隊を離れるとき、ブーストはなくなる。)</text:p>
      <text:p text:style-name="P77">&lt;サポート&gt;[捨て札]:このターン、あなたが次にあなたの手札からプレイするキャラクターの[ウラ]能力を起動する。</text:p>
      <text:p text:style-name="P77">あなたの探検隊に他のキャラクター1体が加わるたび、私の探検隊が遅れているなら、私は2ブーストを得る。（ブーストは+1/+1/+1カウンターである。探検隊を離れるとき、ブーストはなくなる。）</text:p>
      <text:p text:style-name="P77">（私を探検隊にプレイする。私の探検隊が前進したなら、休息時に私をリザーブに送る。）</text:p>
      <text:p text:style-name="P77">[両面]私は一過を得る。（私がリザーブに送られるなら、代わりに捨て札にする。）</text:p>
      <text:p text:style-name="P77">夕方に私の探検隊が前進するなら、代わりに1地域追加で前進する。</text:p>
      <text:p text:style-name="P77">[表]あなたはラッシュしてもよい。そうしたなら私の探検隊は上昇する。（ラッシュするには、他のカード1枚をすぐにプレイする。）（休息時まで、それは対戦相手の探検隊とその地域の地形で同点であったとしても前進できる。）</text:p>
      <text:p text:style-name="P77">[表]私の探検隊が遅れているなら、対象の探検隊にオーディスの新兵 1/1/1 兵士 トークン<text:span text:style-name="T61">1</text:span>体を生成する。</text:p>
      <text:p text:style-name="P77">&lt;サポート&gt;[捨て札]:このターン、あなたが次にあなたの手札からプレイするパーマネントのコストは<text:span text:style-name="T61">[1]減る。</text:span></text:p>
      <text:p text:style-name="P77">[ウラ]リサプライする。(あなたのデッキの一番上のカードをあなたのリザーブに置く。</text:p>
      <text:p text:style-name="P77">[両面]あなたはサボタージュするためにラッシュしてもよい。(リザーブのカード最大1枚を対象とし、それを捨て札にする。)（ラッシュするには、他のカード1枚をすぐにプレイする。）</text:p>
      <text:p text:style-name="P9">（ランドマーク。私が一過を得ることはない。）</text:p>
      <text:p text:style-name="P9">あなたがキャラクター1体を、それの基本スタッツが0である地形にプレイした時-私は試練カウンターを1個得る。</text:p>
      <text:p text:style-name="P9">私が私の3つ目の試練カウンターを得たとき-私を生け贄に捧げる。そうしたなら、ドラゴンの影 5/5/5 イリュージョン トークンを対象の探検隊に生成し、あなたのリザーブのカード1枚をあなたの手札に戻す。</text:p>
      <text:p text:style-name="P9">あなたはあなたのリザーブの消耗しているカードをプレイしてもよい。</text:p>
      <text:p text:style-name="P9">[ウラ]消耗リサプライする。（あなたのデッキの一番上のカードをあなたのリザーブに置く。それを消耗する。それは消耗している限り、サポート能力を失い、プレイできない。）</text:p>
      <text:p text:style-name="P9">（私を探検隊にプレイする。私の探検隊が前進したなら、休息時に私をリザーブに送る。）</text:p>
      <text:p text:style-name="P9">[両面]消耗リサプライする。（あなたのデッキの一番上のカードをあなたのリザーブに置く。それを消耗する。それは消耗している限り、サポート能力を失い、プレイできない。）</text:p>
      <text:p text:style-name="P9">あなたはあなたのリザーブの消耗しているキャラクターを私の探検隊にプレイしてもよい。</text:p>
      <text:p text:style-name="P9">[表]サボタージュする。（リザーブのカード最大1枚を対象とし、それを捨て札にする。）</text:p>
      <text:p text:style-name="P48">（ランドマーク。私が一過を得ることはない。）</text:p>
      <text:p text:style-name="P48">あなたがコントロールするキャラクター1体が<text:span text:style-name="T1">一過</text:span>を得た時-私は<text:span text:style-name="T28">試練カウンターを1個得る。</text:span></text:p>
      <text:p text:style-name="P21">私が私の3個目の試練カウンターを得たとき-私を生け贄に捧げる。ドラゴンの影 5/5/5 イリュージョン トークン<text:span text:style-name="T20">1体を</text:span>対象の探検隊に生成する。その後、あなたのコントロールしている各キャラクターは<text:span text:style-name="T29">1ブーストを得る。(ブーストは+1/+1/+1カウンターである。探検隊を離れるとき、ブーストはなくなる。)</text:span></text:p>
      <text:p text:style-name="P41">[表]私が1つの地形の地域にいるなら、サボタージュする。そうでないなら、私の探検隊は上昇する。（リザーブのカード最大1枚を対象とし、それを捨て札にする。）（休息時まで、それは対戦相手の探検隊とその地域の地形で同点であったとしても前進できる。）</text:p>
      <text:p text:style-name="P9">（ランドマーク。私が一過を得ることはない。）</text:p>
      <text:p text:style-name="P9">カードが1枚あなたの手札やデッキからリザーブに置かれるたび-私は試練カウンターを1個得る。</text:p>
      <text:p text:style-name="P9">私が私の3つ目の試練カウンターを得たとき-私を生け贄に捧げる。そうしたなら、ドラゴンの影 5/5/5 イリュージョン トークンを対象の探検隊に生成し、あなたのリザーブの全てのカードを非消耗にする。</text:p>
      <text:p text:style-name="P9">[ウラ]私は2ブーストを得る。（ブーストは+1/+1/+1カウンターである。探検隊を離れるとき、ブーストはなくなる。）<text:line-break/><text:span text:style-name="T62">私が探検隊を離れる時-あなたは基本コスト[2]以下のキャラクター1体を無料でプレイしてもよい。（リザーブからプレイするならリザーブコスト、そうでないなら手札コストである。）</text:span></text:p>
      <text:p text:style-name="P60"><text:soft-page-break/>[ウラ]対象のキャラクターは2ブーストを得る。（ブーストは+1/+1/+1カウンターである。探検隊を離れるとき、ブーストはなくなる。）</text:p>
      <text:p text:style-name="P60"><text:span text:style-name="T1">一過</text:span>（私がリザーブに送られるなら、代わりに捨て札にする。）</text:p>
      <text:p text:style-name="P60">キャラクターかパーマネントを生け贄に捧げる。そうしたなら対象のキャラクターかパーマネントを捨て札にする。</text:p>
      <text:p text:style-name="P60">[ウラ]あなたは対象の手札コスト[2]以下のキャラクター1体をリザーブに送るために私の1ブーストを支払ってもよい。（ブーストは+1/+1/+1カウンターである。探検隊を離れるとき、ブーストはなくなる。）</text:p>
      <text:p text:style-name="P60">&lt;サポート&gt;[無限]:あなたが呪文をプレイするたび-私は2ブーストを最大として1ブーストを得る。</text:p>
      <text:p text:style-name="P48">（ランドマーク。私が一過を得ることはない。）</text:p>
      <text:p text:style-name="P48">あなたがコントロールするキャラクター1体が<text:span text:style-name="T1">一過</text:span>を得た時-私は<text:span text:style-name="T28">試練カウンターを1個得る。</text:span></text:p>
      <text:p text:style-name="P21">私が私の3個目の試練カウンターを得たとき-私を生け贄に捧げる。ドラゴンの影 5/5/5 イリュージョン トークン<text:span text:style-name="T20">1体を</text:span>対象の探検隊に生成する。その後、あなたのコントロールしている各キャラクターは<text:span text:style-name="T29">1ブーストを得る。(ブーストは+1/+1/+1カウンターである。探検隊を離れるとき、ブーストはなくなる。)</text:span></text:p>
      <text:p text:style-name="P9">（ランドマーク。私が一過を得ることはない。）</text:p>
      <text:p text:style-name="P9">[消耗]:対象の探検隊は上昇する。（休息時まで、それは対戦相手の探検隊とその地域の地形で同点であったとしても前進できる。）</text:p>
      <text:p text:style-name="P9">あなたの上昇した探検隊の1つが再び上昇しようとするなら、代わりにリサプライする。（あなたのデッキの一番上のカードをあなたのリザーブに置く。）</text:p>
      <text:p text:style-name="P9">＜サポート＞<text:span text:style-name="T18">[捨て札]:このターン、次にあなたがプレイするカードのコストは[1]減る。</text:span></text:p>
      <text:p text:style-name="P9">[表]あなたはキャラクター1体を生け贄に捧げてもよい。そうしたなら私は2ブーストを得る。（ブーストは+1/+1/+1カウンターである。探検隊を離れるとき、ブーストはなくなる。）</text:p>
      <text:p text:style-name="P9">[ウラ]リザーブの対象のカード1枚を消耗してもよい。（それは消耗している限り、サポート能力を失い、プレイできない。）</text:p>
      <text:p text:style-name="P9">あなたがパーマネント1つを生け贄に捧げた時-私がブーストを持っていないなら、私は1ブーストを得る。（ブーストは+1/+1/+1カウンターである。探検隊を離れるとき、ブーストはなくなる。）</text:p>
      <text:p text:style-name="P9">[表]サボタージュする。（リザーブのカード最大1枚を対象とし、それを捨て札にする。）</text:p>
      <text:p text:style-name="P9">[表]場（探検隊かランドマーク）かリザーブの対象のカードから最大2つまでのカウンターを取り除く。(ヒーローを対象にできない。)</text:p>
      <text:p text:style-name="P60">スカウト<text:span text:style-name="T63">[3]（あなたは私を手札から[3]でプレイしてもよい。そうしたなら「[表]私をリザーブに送る。」を持つ。）</text:span></text:p>
      <text:p text:style-name="P61">[両面]あなたのリザーブのカード1枚をあなたのマナ・ゾーンに置いてもよい。(それらは消耗したマナ・オーブである)</text:p>
      <text:p text:style-name="P61">永遠（私は休息時にリザーブに送られない。）</text:p>
      <text:p text:style-name="P61">[表]あなたはあなたのリザーブのカード1枚を捨て札にしてもよい。そうしたならカードを1枚引く。そうしないなら、各プレイヤーはカードを1枚引く。</text:p>
      <text:p text:style-name="P61">対象の手札コスト[3]以下のキャラクターは<text:span text:style-name="T1">アンカー</text:span>を得る。（休息時、私はリザーブに送られず、代わりにアンカーを失う。）</text:p>
      <text:p text:style-name="P9">[表]リザーブの対象のカード1枚を消耗してもよい。（それは消耗している限り、サポート能力を失い、プレイできない。）その後、リザーブに2枚以上の消耗したカードがあるなら、私は1ブーストを得る。</text:p>
      <text:p text:style-name="P53">（私を探検隊にプレイする。私の探検隊が前進したなら、休息時に私をリザーブに送る。）</text:p>
      <text:p text:style-name="P12">私の探検隊のキャラクターが1体だけであるなら、それは巨大である。（私はあなたの両方の探検隊に存在しているとみなす。）</text:p>
      <text:p text:style-name="P9">[両面]リザーブの対象のカード1枚を消耗してもよい。（それは消耗している限り、サポート能力を失い、プレイできない。）</text:p>
      <text:p text:style-name="P9">防衛（私の探検隊は夕方に前進できない。）</text:p>
      <text:p text:style-name="P9">タフ1（対戦相手が私を対象にするなら、[<text:span text:style-name="T63">1</text:span>]を追加で支払う。）</text:p>
      <text:p text:style-name="P61">[両面]私は<text:span text:style-name="T1">アンカー</text:span>を得る。（休息時、私はリザーブに送られず、代わりにアンカーを失う。）</text:p>
      <text:p text:style-name="P61">6面ダイスを1個振る。対象のキャラクターはXブーストを得る。Xはその出目である。（ブーストは+1/+1/+1カウンターである。探検隊を離れるとき、ブーストはなくなる。）</text:p>
      <text:p text:style-name="P61">[表]私は1ブーストを得る。その後、サボタージュする。（ブーストは+1/+1/+1カウンターである。探検隊を離れるとき、ブーストはなくなる。）（リザーブのカード最大1枚を対象とし、それを捨て札にする。）</text:p>
      <text:p text:style-name="P34">キャラクター1体が、私と相対する探検隊に加わった時-あなたは私の探検隊を入れ替えてもよい。</text:p>
      <text:p text:style-name="P34">[ウラ]あなたの各探検隊に、オーディスの新兵 1/1/1 兵士 トークン1体を生成する。</text:p>
      <text:p text:style-name="P34">[両面]3つ以上の1つの地形である地域が見えているなら、私は1ブーストを得る。（ブーストは+1/+1/+1カウンターである。探検隊を離れるとき、ブーストはなくなる。）</text:p>
      <text:p text:style-name="P34">対象のキャラクターは<text:span text:style-name="T1">睡眠</text:span>を得る。（夕方、私のスタッツを無視する。休息時、それはリザーブに送られず、代わりに睡眠を失う。）</text:p>
      <text:p text:style-name="P34">&lt;サポート&gt;[捨て札]:このターン、次にあなたがプレイするキャラクターは1ブーストを得る。(ブーストは+1/+1/+1カウンターである。探検隊を離れるとき、ブーストはなくなる。)</text:p>
      <text:p text:style-name="P34">（ランドマーク。私が一過を得ることはない。）</text:p>
      <text:p text:style-name="P34">[消耗]:このターン、次にあなたがプレイする呪文は無料である。あなたがそれをあなたの手札からプレイしていたなら、それは<text:span text:style-name="T1">一過</text:span>を失う。</text:p>
      <text:p text:style-name="P12">[ウラ]サボタージュする。（リザーブのカード最大1枚を対象とし、それを捨て札にする。）</text:p>
      <text:p text:style-name="P41">[表]対象のプレイヤーのランドマークに、エアロリス トークン1個を生成する。（それは「これが生け贄に捧げられたとき-リサプライする。」と「［消耗］,［1］:これを生け贄に捧げる。」を持つパーマネントである。）</text:p>
      <text:p text:style-name="P41">[ウラ]あなたは対象のキャラクターに1ブーストを得させるためにパーマネント1つを生け贄に捧げてもよい。（ブーストは+1/+1/+1カウンターである。探検隊を離れるとき、ブーストはなくなる。）</text:p>
      <text:p text:style-name="P41">[両面]私はあなたがコントロールする<text:span text:style-name="T64">一過</text:span>を持つキャラクター1体につき1ブーストを得る。（ブーストは+1/+1/+1カウンターである。探検隊を離れるとき、ブーストはなくなる。）</text:p>
      <text:p text:style-name="P53">クールダウン（私が私の効果の解決後にリザーブに置かれるなら、私を消耗する。それは消耗している限り、サポート能力を失い、プレイできない。）</text:p>
      <text:p text:style-name="P53">対象のキャラクターをリザーブに送り、それを消耗する。</text:p>
      <text:p text:style-name="P53">クールダウン（私が私の効果の解決後にリザーブに置かれるなら、私を消耗する。それは消耗している限り、サポート能力を失い、プレイできない。）</text:p>
      <text:p text:style-name="P53">対象のキャラクターをリザーブに送り、それを消耗する。</text:p>
      <text:p text:style-name="P53">[両面]私は<text:span text:style-name="T1">アンカー</text:span>を得る。（休息時、私はリザーブに送られず、代わりにアンカーを失う。）</text:p>
      <text:p text:style-name="P53">昼に-私は1ブーストを得る。（ブーストは+1/+1/+1カウンターである。探検隊を離れるとき、ブーストはなくなる。）</text:p>
      <text:p text:style-name="P53">（ランドマーク。私が一過を得ることはない。）</text:p>
      <text:p text:style-name="P53">[両面]リサプライする。（あなたのデッキの一番上のカードをあなたのリザーブに置く。）</text:p>
      <text:p text:style-name="P53">あなたのリザーブに呪文が1つ以上あるなら、あなたのリザーブ上限は1増える。</text:p>
      <text:p text:style-name="P9">（ランドマーク。私が一過を得ることはない。）</text:p>
      <text:p text:style-name="P9">あなたがキャラクター1体を、それの基本スタッツが0である地形にプレイした時-私は試練カウンターを1個得る。</text:p>
      <text:p text:style-name="P9">私が私の3つ目の試練カウンターを得たとき-私を生け贄に捧げる。そうしたなら、ドラゴンの影 5/5/5 イリュージョン トークンを対象の探検隊に生成し、あなたのリザーブのカード1枚をあなたの手札に戻す。</text:p>
      <text:p text:style-name="P49">&lt;サポート&gt;<text:span text:style-name="T37">[</text:span>無限<text:span text:style-name="T37">]私はリザーブ上限に数えない。</text:span></text:p>
      <text:p text:style-name="P49">（ランドマーク。私が一過を得ることはない。）</text:p>
      <text:p text:style-name="P49">[両面]カードを1枚引く。</text:p>
      <text:p text:style-name="P49">あなたのコントロールするキャラクターはタフ1を持つ。（対戦相手が私を対象にするなら、[1]追加で支払う。）</text:p>
      <text:p text:style-name="P49">[ウラ]あなたはカードを1枚引くためにラッシュしてもよい。（ラッシュするには、他のカード1枚をすぐにプレイする。）</text:p>
      <text:p text:style-name="P49">私が2以上のキャラクターに相対しているのでない限り、私は防衛を持つ。（私の探検隊は夕方に前進できない。）</text:p>
      <text:p text:style-name="P49">[ウラ]対象のキャラクターは1ブーストを得る。（ブーストは+1/+1/+1カウンターである。探検隊を離れるとき、ブーストはなくなる。）</text:p>
      <text:p text:style-name="P34">&lt;サポート&gt;[捨て札]:このターン、次にあなたがプレイするキャラクターは1ブーストを得る。(ブーストは+1/+1/+1カウンターである。探検隊を離れるとき、ブーストはなくなる。)</text:p>
      <text:p text:style-name="P34">（ランドマーク。私が一過を得ることはない。）</text:p>
      <text:p text:style-name="P34">カード1枚が午後にあなたのリザーブを離れた時-私は活液カウンターを1個得る。</text:p>
      <text:p text:style-name="P34">[消耗],私の活液カウンター3つを支払う:3ブーストをリザーブの望む数のキャラクターに割り振って置く。（ブーストは+1/+1/+1カウンターである。探検隊を離れるとき、ブーストはなくなる。）</text:p>
      <text:p text:style-name="P34">巨大（私はあなたの両方の探検隊に存在しているとみなす。）</text:p>
      <text:p text:style-name="P34">[両面]私は私に相対しているキャラクター1体につき1ブーストを得る。</text:p>
      <text:p text:style-name="P34">リサプライする。（あなたのデッキの一番上のカードをあなたのリザーブに置く。）</text:p>
      <text:p text:style-name="P34">キャラクター1体が、私と相対する探検隊に加わった時-あなたは私の探検隊を入れ替えてもよい。</text:p>
      <text:p text:style-name="P34">巨大（私はあなたの両方の探検隊に存在しているとみなす。）</text:p>
      <text:p text:style-name="P34">[表]サボタージュする。（リザーブのカード最大1枚を対象とし、それを捨て札にする。）</text:p>
      <text:p text:style-name="P34">私が生け贄に捧げられた時、私が<text:span text:style-name="T1">一過</text:span>でなら-私をリザーブに置く。</text:p>
      <text:p text:style-name="P34">[両面]あなたは対象の他のキャラクターに<text:span text:style-name="T1">一過</text:span>を失わせてもよい。</text:p>
      <text:p text:style-name="P9">[表]私が上昇した探検隊にいるなら、私は1ブーストを得る。そうでないなら、私の探検隊は上昇する。（休息時まで、それは対戦相手の探検隊とその地域の地形で同点であったとしても前進できる。）</text:p>
      <text:p text:style-name="P9">[両面]各プレイヤーはキャラクター1体を生け贄に捧げる。</text:p>
      <text:p text:style-name="P9">[ウラ]リザーブの対象のカード1枚を消耗してもよい。（それは消耗している限り、サポート能力を失い、プレイできない。）</text:p>
      <text:p text:style-name="P51">カードを1枚引く。</text:p>
      <text:p text:style-name="P51">あなたの両方の探検隊は上昇する。（休息時まで、それは対戦相手の探検隊とその地域の地形で同点であったとしても前進できる。）</text:p>
      <text:p text:style-name="P51">即座に最大3までの基本コスト[3]以下のキャラクターを無料でプレイする。（リザーブからプレイするならリザーブコスト、そうでないなら手札コストである。）</text:p>
      <text:p text:style-name="P51">[両面]私がキャラクターに相対しているなら、私は1ブーストを得る。（ブーストは+1/+1/+1カウンターである。探検隊を離れるとき、ブーストはなくなる。）</text:p>
      <text:p text:style-name="P51">[ウラ]私の探検隊は上昇する。（休息時まで、それは対戦相手の探検隊とその地域の地形で同点であったとしても前進できる。）</text:p>
      <text:p text:style-name="P9"><text:span text:style-name="T19">[</text:span>両面<text:span text:style-name="T19">]あなたは</text:span>即座に[<text:span text:style-name="T19">3</text:span>]コスト減らしてキャラクターを1体プレイしてもよい。</text:p>
      <text:p text:style-name="P21">[表]<text:span text:style-name="T46">6面ダイスを1個振る。</text:span></text:p>
      <text:p text:style-name="P21">・<text:span text:style-name="T46">4+ リサプライする。</text:span></text:p>
      <text:p text:style-name="P21">・<text:span text:style-name="T46">1-3 消耗リサプライする。（あなたのデッキの一番上のカードをあなたのリザーブに置く。それを消耗する。それは消耗している限り、サポート能力を失い、プレイできない。）</text:span></text:p>
      <text:p text:style-name="P21">[表]あなたはサボタージュするためにキャラクターかパーマネント1つを生け贄に捧げてもよい。</text:p>
      <text:p text:style-name="P9">＜サポート＞<text:span text:style-name="T18">[捨て札]:このターン、次にあなたがプレイするパーマネントのコストは[1]減る。</text:span></text:p>
      <text:p text:style-name="P53">（ランドマーク。私が一過を得ることはない。）</text:p>
      <text:p text:style-name="P53">トークンでないキャラクター1体があなたの探検隊に加わった時-それは1ブーストを得る。</text:p>
      <text:p text:style-name="P9">＜サポート＞<text:span text:style-name="T18">[捨て札]:対象のキャラクターは</text:span><text:span text:style-name="T11">一過</text:span><text:span text:style-name="T18">を失う。</text:span></text:p>
      <text:p text:style-name="P9">[両面]私は<text:span text:style-name="T1">睡眠</text:span>を得る。（夕方、私のスタッツを無視する。休息時、それはリザーブに送られず、代わりに睡眠を失う。）</text:p>
      <text:p text:style-name="P9">キャラクター1体が私の相対している探検隊に加わった時-あなたは私に<text:span text:style-name="T1">睡眠</text:span>を失わせてもよい。</text:p>
      <text:p text:style-name="P9">[両面]キャラクター1体を生け贄に捧げる。</text:p>
      <text:p text:style-name="P41">あなたのリザーブのキャラクターが1つ以上のブーストを得た時-対象のキャラクターは1ブーストを得る。</text:p>
      <text:p text:style-name="P41">[両面]あなたはカードを1枚引くためにあなたのリザーブのカード1枚を捨て札にしてもよい。</text:p>
      <text:p text:style-name="P49">[ウラ]<text:span text:style-name="T32">あなたは場（探検隊かランドマーク）やリザーブの対象のカード1つを増強してもよい。（それがカウンターを持っているなら、それは追加で</text:span><text:span text:style-name="T23">1個得る。ヒーローを対象にできない。）</text:span></text:p>
      <text:p text:style-name="P53">[ウラ]あなたはリサプライするために私の1ブーストを支払ってもよい。（あなたのデッキの一番上のカードをあなたのリザーブに置く。）</text:p>
      <text:p text:style-name="P53">＜サポート＞<text:span text:style-name="T15">[無限]昼に-1つを選ぶ:</text:span></text:p>
      <text:p text:style-name="P53">・私は3ブーストを最大として1ブーストを得る。</text:p>
      <text:p text:style-name="P53">・<text:span text:style-name="T15">[消耗]:私は3ブーストを最大として2ブーストを得る。</text:span></text:p>
      <text:p text:style-name="P53">（ランドマーク。私が一過を得ることはない。）</text:p>
      <text:p text:style-name="P53">あなたが基本コスト<text:span text:style-name="T65">[4]以上の呪文1つをプレイした時-あなたは対象のキャラクターに1ブーストを得させてもよい。</text:span></text:p>
      <text:p text:style-name="P21"><text:span text:style-name="T1">一過</text:span>（私がリザーブに送られるなら、代わりに捨て札にする。）</text:p>
      <text:p text:style-name="P21">6面ダイスを1個振る。その後キャラクター1体を対象とする。</text:p>
      <text:p text:style-name="P21">・4+ それは<text:span text:style-name="T1">アンカー</text:span>を得る。（休息時、私はリザーブに送られず、代わりにアンカーを失う。）</text:p>
      <text:p text:style-name="P53"><text:span text:style-name="T28">・</text:span><text:span text:style-name="T57">1-3</text:span><text:span text:style-name="T28"> それは</text:span><text:span text:style-name="T12">睡眠</text:span><text:span text:style-name="T28">を得る。（夕方、私のスタッツを無視する。休息時、それはリザーブに送られず、代わりに睡眠を失う。）</text:span></text:p>
      <text:p text:style-name="P21"><text:span text:style-name="T1">一過</text:span>（私がリザーブに送られるなら、代わりに捨て札にする。）</text:p>
      <text:p text:style-name="P21">あなたのマナ・オーブ1つを捨て札にする。そうしたなら、対象のキャラクターかパーマネントを捨て札にする。</text:p>
      <text:p text:style-name="P21">防衛（私の探検隊は夕方に前進できない。）</text:p>
      <text:p text:style-name="P21">[両面]あなたが2つ以上のランドマークをコントロールしているなら、各プレイヤーはキャラクター1体を生け贄に捧げる。</text:p>
      <text:p text:style-name="P21">&lt;サポート&gt;<text:span text:style-name="T65">[捨て札]:あなたのコンパニオンの探検隊に、オーディスの新兵 1/1/1 兵士 トークン1体を生成する。</text:span></text:p>
      <text:p text:style-name="P21">[両面]あなたが2つ以上のランドマークをコントロールしているなら、私は1ブーストを得る。（ブーストは+1/+1/+1カウンターである。探検隊を離れるとき、ブーストはなくなる。）</text:p>
      <text:p text:style-name="P21">[両面]あなたのリザーブの対象のカード1枚を、あなたの手札のカード1枚と交換する。</text:p>
      <text:p text:style-name="P21">（ランドマーク。私が一過を得ることはない。）</text:p>
      <text:p text:style-name="P21">昼に-ブラスバグ 2/2/2 ロボット トークン1体をあなたの（相対する探検隊よりも）遅れているか同地である各探検隊に生成する。</text:p>
      <text:p text:style-name="P21">（ランドマーク。私が一過を得ることはない。）</text:p>
      <text:p text:style-name="P21">[両面]対象の探検隊にブラスバグ 2/2/2 ロボット トークン1体を生成する。</text:p>
      <text:p text:style-name="P21">昼に-対象の探検隊にブラスバグ 2/2/2 ロボット トークン1体を生成する。</text:p>
      <text:p text:style-name="P21">（ランドマーク。私が一過を得ることはない。）</text:p>
      <text:p text:style-name="P62">[2],[消耗]:カードを1枚引く。</text:p>
      <text:p text:style-name="P49">[ウラ]あなたはカードを1枚引くためにラッシュしてもよい。（ラッシュするには、他のカード1枚をすぐにプレイする。）</text:p>
      <text:p text:style-name="P49">巨大（私はあなたの両方の探検隊に存在しているとみなす。）</text:p>
      <text:p text:style-name="P49">[表]私の探検隊のいずれもが山のではないなら、カードを1枚引く。</text:p>
      <text:p text:style-name="P59"><text:soft-page-break/>[ウラ]あなたはあなたのデッキの一番上のカードをあなたのマナ・ゾーンに置いてもよい。（それらは消耗したマナ・オーブである）</text:p>
      <text:p text:style-name="P49">[表]あなたは<text:span text:style-name="T66">[2]を支払ってもよい。そうしたなら、私と相対している探検隊の対象のキャラクターは</text:span><text:span text:style-name="T13">睡眠</text:span><text:span text:style-name="T66">を得る。（夕方、私のスタッツを無視する。休息時、それはリザーブに送られず、代わりに睡眠を失う。）</text:span></text:p>
      <text:p text:style-name="P49">&lt;サポート&gt;<text:span text:style-name="T66">[捨て札]:あなたのコントロールする対象の手札コスト[4]以下のキャラクターは</text:span><text:span text:style-name="T13">睡眠</text:span><text:span text:style-name="T66">を得る。</text:span></text:p>
      <text:p text:style-name="P49">[表]場やリザーブにあるすべてのキャラクターのすべてのブーストを取り除く。これによって取り除かれたブーストが：</text:p>
      <text:p text:style-name="P49">・<text:span text:style-name="T66">1-4: 私は2ブーストを得る。（ブーストは+1/+1/+1カウンターである。探検隊を離れるとき、ブーストはなくなる。）</text:span></text:p>
      <text:p text:style-name="P49">・<text:span text:style-name="T66">5-8: 手札コスト[3]以下のカード1つを無料でプレイする。</text:span></text:p>
      <text:p text:style-name="P49">・<text:span text:style-name="T66">9+:私の探検隊は1地域前進する。</text:span></text:p>
      <text:p text:style-name="P49"><text:span text:style-name="T1">一過</text:span>（私がリザーブに送られるなら、代わりに捨て札にする。）</text:p>
      <text:p text:style-name="P49">対象の手札コスト<text:span text:style-name="T66">[5]以下のキャラクターを捨て札にする。その後、それの探検隊にマナ・モス 2/2/2 イリュージョン トークン1体を生成する。</text:span></text:p>
      <text:p text:style-name="P49">あなたのリザーブにリザーブコスト<text:span text:style-name="T66">[4]以上の呪文があるなら、私のコストは[2]減る。</text:span></text:p>
      <text:p text:style-name="P49">巨大（私はあなたの両方の探検隊に存在しているとみなす。）</text:p>
      <text:p text:style-name="P49">[両面]あなたのリザーブに2枚以上のカードがあるなら、私は1ブーストと<text:span text:style-name="T1">一過</text:span>を得る。（ブーストは+1/+1/+1カウンターである。探検隊を離れるとき、ブーストはなくなる。）（私がリザーブに送られるなら、代わりに捨て札にする。）</text:p>
      <text:p text:style-name="P21">（ランドマーク。私が一過を得ることはない。）</text:p>
      <text:p text:style-name="P21">昼に-オーディスの新兵 1/1/1 兵士 トークン<text:span text:style-name="T67">1体</text:span>をあなたの（相対する探検隊よりも）遅れているか同地である各探検隊に生成する。</text:p>
      <text:p text:style-name="P21">[表]6面ダイスを1個振る:</text:p>
      <text:p text:style-name="P21">・<text:span text:style-name="T68">4+:サボタージュする。(リザーブのカード最大1枚を対象とし、それを捨て札にする。)</text:span></text:p>
      <text:p text:style-name="P21">・<text:span text:style-name="T68">1-3:リサプライする。（あなたのデッキの一番上のカードをあなたのリザーブに置く。）</text:span></text:p>
      <text:p text:style-name="P21"><text:span text:style-name="T1">一過</text:span>（私がリザーブに送られるなら、代わりに捨て札にする。）</text:p>
      <text:p text:style-name="P21">対象のキャラクターをリザーブに送る。</text:p>
      <text:p text:style-name="P77">あなたはサボタージュするためにラッシュしてもよい。(リザーブのカード最大1枚を対象とし、それを捨て札にする。)（ラッシュするには、他のカード1枚をすぐにプレイする。）</text:p>
      <text:p text:style-name="P77">[表]あなたはリザーブの対象のカードを消耗してもよい。（それは消耗している限り、サポート能力を失い、プレイできない。）</text:p>
      <text:p text:style-name="P77">他のキャラクター1体が私の探検隊に加わった時-あなたが<text:span text:style-name="T1">一過</text:span>であるキャラクターをコントロールしているなら、対象の最大2体までのキャラクターはそれぞれ1ブーストを得る。（ブーストは+1/+1/+1カウンターである。探検隊を離れるとき、ブーストはなくなる。）</text:p>
      <text:p text:style-name="P49">&lt;サポート&gt;<text:span text:style-name="T66">[捨て札]:対象の探検隊にオーディスの新兵 1/1/1 兵士 トークン</text:span><text:span text:style-name="T68">1体を生成する。</text:span></text:p>
      <text:p text:style-name="P49">[両面]あなたのリザーブに2枚以上のカードがあるなら、私は1ブーストと<text:span text:style-name="T1">一過</text:span>を得る。（ブーストは+1/+1/+1カウンターである。探検隊を離れるとき、ブーストはなくなる。）（私がリザーブに送られるなら、代わりに捨て札にする。）</text:p>
      <text:p text:style-name="P49"><text:span text:style-name="T1">一過</text:span>（私がリザーブに送られるなら、代わりに捨て札にする。）</text:p>
      <text:p text:style-name="P49">1つを選ぶ:</text:p>
      <text:p text:style-name="P49">・森の対象のキャラクターをリザーブに送る。</text:p>
      <text:p text:style-name="P49">・対象のパーマネントを捨て札にする。</text:p>
      <text:p text:style-name="P49">（ランドマーク。私が一過を得ることはない。）</text:p>
      <text:p text:style-name="P49">あなたの探検隊にキャラクター1体が加わった時-それは1ブーストを得る。（ブーストは+1/+1/+1カウンターである。探検隊を離れるとき、ブーストはなくなる。）</text:p>
      <text:p text:style-name="P21">[表]6面ダイスを1個振る。<text:span text:style-name="T68">4+なら、カードを1枚引く。1-3ならリサプライする。（あなたのデッキの一番上のカードをあなたのリザーブに置く。）</text:span></text:p>
      <text:p text:style-name="P21">[ウラ]あなたの手札が空なら、私は1ブーストを得る。（ブーストは+1/+1/+1カウンターである。探検隊を離れるとき、ブーストはなくなる。）</text:p>
      <text:p text:style-name="P21">私が<text:span text:style-name="T1">睡眠</text:span>を得るなら、代わりに<text:span text:style-name="T1">アンカー</text:span>を得る。（休息時、私はリザーブに送られず、代わりにアンカーを失う。）</text:p>
      <text:p text:style-name="P21">[両面]各プレイヤーは自分の手札のカード1枚をリザーブに置く。</text:p>
      <text:p text:style-name="P53">(ランドマーク。私が一過を得ることはない。)</text:p>
      <text:p text:style-name="P53">[両面]対象の探検隊は上昇する。(休息時まで、それは対戦相手の探検隊とその地域の地形で同点であったとしても前進できる。)</text:p>
      <text:p text:style-name="P53"><text:span text:style-name="T69">[消耗]:上昇している探検隊の対象のキャラクターは</text:span>1ブーストを得る。(ブーストは+1/+1/+1カウンターである。探検隊を離れるとき、ブーストはなくなる。)</text:p>
      <text:p text:style-name="P53">あなたが1個以上の6面ダイスを振った時-私は1ブーストを得る。（ブーストは+1/+1/+1カウンターである。探検隊を離れるとき、ブーストはなくなる。）</text:p>
      <text:p text:style-name="P77">私の探検隊が夕方に前進するのに失敗した時-カードを1枚引く。</text:p>
      <text:p text:style-name="P77">「異議あり！」</text:p>
      <text:p text:style-name="P53">[両面]あなたはあなたのリザーブのカード1枚を捨て札にしてもよい。そうしたなら対象のキャラクターは<text:span text:style-name="T69">2ブーストを得る。（ブーストは+1/+1/+1カウンターである。探検隊を離れるとき、ブーストはなくなる。）</text:span></text:p>
      <text:p text:style-name="P53">[ウラ]あなたはあなたのリザーブのカード1枚を捨て札にしてもよい。そうしたなら対象のキャラクターは<text:span text:style-name="T1">アンカー</text:span>を得る。（休息時、私はリザーブに送られず、代わりにアンカーを失う。）</text:p>
      <text:p text:style-name="P53">&lt;サポート&gt;<text:span text:style-name="T69">[捨て札]:このターン、あなたが次にプレイするキャラクターは1ブーストを得る。</text:span></text:p>
      <text:p text:style-name="P38">（ランドマーク。私が一過を得ることはない。）</text:p>
      <text:p text:style-name="P38">あなたが1つ以上の6面ダイスを振るなら、それに加えてあなたのデッキの一番上のカードも公開する。</text:p>
      <text:p text:style-name="P38">あなたがこれによってカードを公開したなら-そのカードの手札コストがダイスの出目に等しいなら、それを引く。</text:p>
      <text:p text:style-name="P38">クールダウン（私が私の効果の解決後にリザーブに置かれるなら、私を消耗する。それは消耗している限り、サポート能力を失い、プレイできない。）</text:p>
      <text:p text:style-name="P38">リサプライする。（あなたのデッキの一番上のカードをあなたのリザーブに置く。）</text:p>
      <text:p text:style-name="P38"><text:span text:style-name="T1">一過</text:span>（私がリザーブに送られるなら、代わりに捨て札にする。）</text:p>
      <text:p text:style-name="P38">あなたがコントロールしているキャラクター1体の手札コスト以下の手札コストである対象のキャラクターを捨て札にする。</text:p>
      <text:p text:style-name="P38">&lt;サポート&gt;<text:span text:style-name="T69">[捨て札]:お先にどうぞ。</text:span><text:span text:style-name="T18">（カードをプレイしたかのようにあなたのターンを終了する。あなたはまだカードをプレイできる。）</text:span></text:p>
      <text:p text:style-name="P38">クールダウン（私が私の効果の解決後にリザーブに置かれるなら、私を消耗する。それは消耗している限り、サポート能力を失い、プレイできない。）</text:p>
      <text:p text:style-name="P38">対象のキャラクターは1ブーストを得る。</text:p>
      <text:p text:style-name="P38">&lt;サポート&gt;<text:span text:style-name="T69">[捨て札]:対象の手札コスト[3]以下のキャラクターは</text:span><text:span text:style-name="T14">アンカー</text:span><text:span text:style-name="T69">を得る。（休息時、私はリザーブに送られず、代わりにアンカーを失う。）</text:span></text:p>
      <text:p text:style-name="P51">[表]対象の対戦相手は消耗リサプライしてもよい。(あなたのデッキの一番上のカードをあなたのリザーブに置く。それを消耗する。それは消耗している限り、サポート能力を失い、プレイできない。）</text:p>
      <text:p text:style-name="P38">クールダウン（私が私の効果の解決後にリザーブに置かれるなら、私を消耗する。それは消耗している限り、サポート能力を失い、プレイできない。）</text:p>
      <text:p text:style-name="P38">あなたのリザーブの対象の呪文をあなたの手札のカード1枚と交換する。</text:p>
      <text:p text:style-name="P38">（ランドマーク。私が一過を得ることはない。）</text:p>
      <text:p text:style-name="P38">[両面]リサプライする。（あなたのデッキの一番上のカードをあなたのリザーブに置く。）</text:p>
      <text:p text:style-name="P38">あなたのコントロールするキャラクターはタフ1を持つ。（対戦相手が私を対象にするなら、[<text:span text:style-name="T70">1</text:span>]を追加で支払う。）</text:p>
      <text:p text:style-name="P63">（ランドマーク。私が一過を得ることはない。）</text:p>
      <text:p text:style-name="P63">あなたが基本コスト[4]以下のカード1枚をプレイした時-あなたは対象のキャラクターに1ブーストを得させてもよい。（リザーブからプレイするならリザーブコスト、そうでないなら手札コストである。）（ブーストは+1/+1/+1カウンターである。探検隊を離れるとき、ブーストはなくなる。）</text:p>
      <text:p text:style-name="P63">（ランドマーク。私が一過を得ることはない。）</text:p>
      <text:p text:style-name="P63">[両面]あなたは対象の手札コスト[2]以下のキャラクターをリザーブに送ってもよい。</text:p>
      <text:p text:style-name="P63">[両面]私は<text:span text:style-name="T1">アンカー</text:span>を得る。（休息時、私はリザーブに送られず、代わりにアンカーを失う。）</text:p>
      <text:p text:style-name="P63">[両面]あなたのリザーブの各動物/Animalは1ブーストを得る。(ブーストは+1/+1/+1カウンターである。探検隊を離れるとき、ブーストはなくなる。)</text:p>
      <text:p text:style-name="P21"><text:span text:style-name="T1">一過</text:span>（私がリザーブに送られるなら、代わりに捨て札にする。）</text:p>
      <text:p text:style-name="P21">対象のキャラクターをリザーブに送る。</text:p>
      <text:p text:style-name="P77">あなたが先手なら、あなたはサボタージュするためにラッシュしてもよい。(リザーブのカード最大1枚を対象とし、それを捨て札にする。)（ラッシュするには、他のカード1枚をすぐにプレイする。）</text:p>
      <text:p text:style-name="P77">防衛（私の探検隊は夕方に前進できない。）</text:p>
      <text:p text:style-name="P34">（ランドマーク。私が一過を得ることはない。）</text:p>
      <text:p text:style-name="P34">カード1枚が午後にあなたのリザーブを離れた時-私は活液カウンターを1個得る。</text:p>
      <text:p text:style-name="P34">[消耗],私の活液カウンター3つを支払う:あなたのリザーブのキャラクターはそれぞれ<text:span text:style-name="T71">1ブーストを得る。</text:span>（ブーストは+1/+1/+1カウンターである。探検隊を離れるとき、ブーストはなくなる。）</text:p>
      <text:p text:style-name="P38"><text:span text:style-name="T1">一過</text:span>（私がリザーブに送られるなら、代わりに捨て札にする。）</text:p>
      <text:p text:style-name="P38">あなたがコントロールしているキャラクター1体の手札コスト以下の手札コストである対象のキャラクターをリザーブに送る。</text:p>
      <text:p text:style-name="P49"><text:span text:style-name="T1">一過</text:span>（私がリザーブに送られるなら、代わりに捨て札にする。）</text:p>
      <text:p text:style-name="P49">対象の手札コスト<text:span text:style-name="T66">[5]以下のキャラクターを捨て札にする。その後、それの探検隊にマナ・モス 2/2/2 イリュージョン トークン1体を生成する。</text:span></text:p>
      <text:p text:style-name="P49">[表]あなたは対象の手札コスト<text:span text:style-name="T72">[2]以下のキャラクターをリザーブに送ってもよい。</text:span></text:p>
      <text:p text:style-name="P49">[両面]あなたはリザーブの対象の消耗したカードを非消耗にしてもよい。</text:p>
      <text:p text:style-name="P49">[表]5つ以上の1つの地形である地域が見えているなら、対象のキャラクターは<text:span text:style-name="T1">睡眠</text:span>を得る。（夕方、私のスタッツを無視する。休息時、それはリザーブに送られず、代わりに睡眠を失う。）</text:p>
      <text:p text:style-name="P49">[両面]<text:span text:style-name="T72">3</text:span>つ以上の1つの地形である地域が見えているなら、私は1ブーストを得る。（ブーストは+1/+1/+1カウンターである。探検隊を離れるとき、ブーストはなくなる。）</text:p>
      <text:p text:style-name="P49">永遠（私は休息時にリザーブに送られない。）</text:p>
      <text:p text:style-name="P49">昼に-対象の探検隊は上昇する。（休息時まで、それは対戦相手の探検隊とその地域の地形で同点であったとしても前進できる。）</text:p>
      <text:p text:style-name="P49">&lt;サポート&gt;<text:span text:style-name="T73">[捨て札]:あなたのリザーブの他のカード1枚をあなたの手札に戻す。</text:span></text:p>
      <text:p text:style-name="P9">（ランドマーク。私が一過を得ることはない。）</text:p>
      <text:p text:style-name="P9">カードが1枚あなたの手札やデッキからリザーブに置かれるたび-私は試練カウンターを1個得る。</text:p>
      <text:p text:style-name="P9">私が私の3つ目の試練カウンターを得たとき-私を生け贄に捧げる。そうしたなら、ドラゴンの影 5/5/5 イリュージョン トークンを対象の探検隊に生成し、あなたのリザーブの全てのカードを非消耗にする。</text:p>
      <text:p text:style-name="P9">&lt;サポート&gt;<text:span text:style-name="T73">[無限]昼に-場かリザーブの対象の他のキャラクターは1ブーストを得る。（ブーストは+1/+1/+1カウンターである。探検隊を離れるとき、ブーストはなくなる。）</text:span></text:p>
      <text:p text:style-name="P9">[表]あなたは対象のパーマネントを捨て札にしてもよい。そうしないなら、私は<text:span text:style-name="T73">2</text:span>ブーストを得る。（ブーストは+1/+1/+1カウンターである。探検隊を離れるとき、ブーストはなくなる。）</text:p>
      <text:p text:style-name="P64">[両面]各プレイヤーはそれぞれデッキの一番上のカードをマナ・ゾーンに置く。（それらは消耗したマナ・オーブである）</text:p>
      <text:p text:style-name="P64">&lt;サポート&gt;[捨て札]:対象の手札コスト[3]以下のキャラクターは<text:span text:style-name="T1">アンカー</text:span>を得る。（休息時、私はリザーブに送られず、代わりにアンカーを失う。）</text:p>
      <text:p text:style-name="P64"><text:span text:style-name="T1">一過</text:span>（私がリザーブに送られるなら、代わりに捨て札にする。）</text:p>
      <text:p text:style-name="P64">2つを選ぶ：</text:p>
      <text:p text:style-name="P64">・対象のキャラクターは<text:span text:style-name="T1">睡眠</text:span>を得る。（夕方、私のスタッツを無視する。休息時、それはリザーブに送られず、代わりに睡眠を失う。）</text:p>
      <text:p text:style-name="P64">・探検隊かリザーブの対象のキャラクターはそれのすべてのブーストを失う。</text:p>
      <text:p text:style-name="P64">・対象の探検隊の各キャラクターはそれぞれ1ブーストを得る。（ブーストは+1/+1/+1カウンターである。探検隊を離れるとき、ブーストはなくなる。）</text:p>
      <text:p text:style-name="P53"><text:span text:style-name="T74">1</text:span>つ選ぶ：</text:p>
      <text:p text:style-name="P53">・3つの探検隊を対象とし、それらにウーリーバック 1/1/1 動物 トークンをそれぞれ1体生成する。</text:p>
      <text:p text:style-name="P53">・対象の手札コスト[3]以下のキャラクターはアンカーを得る。</text:p>
      <text:p text:style-name="P53">・森の地形マーカーを対象の見えている地域の上に置く。（その地域は、地形マーカーが置かれている限り、そのマーカーの地形のみを持ち、そのほかの地形を失う。）</text:p>
      <text:p text:style-name="P65">対象のキャラクターかパーマネントを持ち主のマナ・ゾーンに置く。（それらは消耗したマナ・オーブである）</text:p>
      <text:p text:style-name="P9">あなたの他の探検隊と、それと相対している探検隊は前進できない。</text:p>
      <text:p text:style-name="P9">&lt;サポート&gt;<text:span text:style-name="T63">[捨て札]:カードを1枚引く。</text:span></text:p>
      <text:p text:style-name="P9"><text:span text:style-name="T1">一過</text:span>（私がリザーブに送られるなら、代わりに捨て札にする。）</text:p>
      <text:p text:style-name="P9">対象のキャラクターは亡命する。（それはコントローラーを変更し、それの相対している探検隊に加わる。）</text:p>
      <text:p text:style-name="P9"><text:span text:style-name="T1">一過</text:span>（私がリザーブに送られるなら、代わりに捨て札にする。）場かリザーブの対象のキャラクター<text:span text:style-name="T75">2</text:span>体はそれらのブーストを交換する。</text:p>
      <text:p text:style-name="P9">カードを1枚引く。</text:p>
      <text:p text:style-name="P9"><text:span text:style-name="T1">一過</text:span>（私がリザーブに送られるなら、代わりに捨て札にする。）</text:p>
      <text:p text:style-name="P66">あなたのマナ・オーブ1つを捨て札にする。そうしたなら、対象のキャラクターかパーマネントを捨て札にする。</text:p>
      <text:p text:style-name="P9">クールダウン<text:span text:style-name="T25">（私が私の効果の解決後にリザーブに置かれるなら、私を消耗する。それは消耗している限り、サポート能力を失い、プレイできない。）</text:span></text:p>
      <text:p text:style-name="P9">対象の探検隊にマナ・モス 2/2/2 イリュージョン トークン<text:span text:style-name="T75">1体を生成する。</text:span></text:p>
      <text:p text:style-name="P9"><text:span text:style-name="T1">一過</text:span>（私がリザーブに送られるなら、代わりに捨て札にする。）</text:p>
      <text:p text:style-name="P9">あなたは私のコストを<text:span text:style-name="T75">[2]減らすために</text:span>パーマネント1つを生け贄に捧げてもよい。</text:p>
      <text:p text:style-name="P9">対象の手札コスト<text:span text:style-name="T75">[3]以下の</text:span>キャラクターをリザーブに送る。</text:p>
      <text:p text:style-name="P9">[表]私が山の探検隊と相対しているなら、あなたのランドマークにエアロリス トークン1個を生成する。（それは「これが生け贄に捧げられたとき-リサプライする。」と「[消耗],[1]:これを生け贄に捧げる。」を持つパーマネントである。）</text:p>
      <text:p text:style-name="P9">[両面]私は<text:span text:style-name="T1">アンカー</text:span>を得る。（休息時、私はリザーブに送られず、代わりにアンカーを失う。）</text:p>
      <text:p text:style-name="P9">昼に-私は2ブーストを得る。</text:p>
      <text:p text:style-name="P9">対象のキャラクターは1ブーストを得る。それが<text:span text:style-name="T1">睡眠</text:span>しているなら、それは<text:span text:style-name="T1">アンカー</text:span>を得て<text:span text:style-name="T1">睡眠</text:span>を失う。（休息時、私はリザーブに送られず、代わりにアンカーを失う。）</text:p>
      <text:p text:style-name="P53">私がプレイされようとしている探検隊にキャラクターがいないなら、私のコストは<text:span text:style-name="T42">[2]減る。</text:span></text:p>
      <text:p text:style-name="P9">私の探検隊に他のキャラクター1体が加わるたび-それを生け贄に捧げる。<text:line-break/><text:span text:style-name="T76">[両面]あなたは対象の探検隊にブラスバグ 2/2/2 ロボット トークン1体を生成するために[2]を払ってもよい。その後、あなたのコントロールする各ロボット/Robotは1ブーストを得る。</text:span></text:p>
      <text:p text:style-name="P67"><text:soft-page-break/>（ブーストは+1/+1/+1カウンターである。探検隊を離れるとき、ブーストはなくなる。）</text:p>
      <text:p text:style-name="P67">（私を探検隊にプレイする。私の探検隊が前進したなら、休息時に私をリザーブに送る。）</text:p>
      <text:p text:style-name="P67">[両面]あなたの探検隊の対象のキャラクターは1ブーストを得る。（ブーストは+1/+1/+1カウンターである。探検隊を離れるとき、ブーストはなくなる。）</text:p>
      <text:p text:style-name="P67">私の地域は他の地形に加えて森でもある。</text:p>
      <text:p text:style-name="P67">[ウラ]リサプライする。（あなたのデッキの一番上のカードをあなたのリザーブに置く。）</text:p>
      <text:p text:style-name="P67">[両面]あなたのコントロールする各植物/Plantは1ブーストを得る。</text:p>
      <text:p text:style-name="P67">対象のキャラクターかパーマネントをそれの持ち主の手札に戻す。その後、私をあなたのマナ・ゾーンに置いてもよい。（それらは消耗したマナ・オーブである）</text:p>
      <text:p text:style-name="P67">少なくとも1つのあなたの探検隊が上昇しているなら、私のコストは[2]減る。</text:p>
      <text:p text:style-name="P67">巨大（私はあなたの両方の探検隊に存在しているとみなす。）</text:p>
      <text:p text:style-name="P67">[表]あなたは対象のキャラクターの探検隊を入れ替えてもよい。</text:p>
      <text:p text:style-name="P67"><text:span text:style-name="T1">一過</text:span>（私がリザーブに送られるなら、代わりに捨て札にする。）</text:p>
      <text:p text:style-name="P67">場やリザーブの対象のキャラクターを捨て札にする。</text:p>
      <text:p text:style-name="P68">[表]あなたの手札のカード1枚をリザーブに置く。</text:p>
      <text:p text:style-name="P68">各プレイヤーは自分がコントロールしているキャラクター1体を選ぶ。それらは<text:span text:style-name="T1">睡眠</text:span>を得る。（あなたが最初に選ぶ。夕方、私のスタッツを無視する。休息時、それはリザーブに送られず、代わりに睡眠を失う。）</text:p>
      <text:p text:style-name="P67">[両面]私の探検隊が遅れているなら、カードを1枚引く。</text:p>
      <text:p text:style-name="P67">[ウラ]あなたはサボタージュするために私の1ブーストを支払ってもよい。</text:p>
      <text:p text:style-name="P53">＜サポート＞<text:span text:style-name="T15">[無限]昼に-1つを選ぶ:</text:span></text:p>
      <text:p text:style-name="P53">・私は3ブーストを最大として1ブーストを得る。</text:p>
      <text:p text:style-name="P53">・<text:span text:style-name="T15">[消耗]:私は3ブーストを最大として2ブーストを得る。</text:span></text:p>
      <text:p text:style-name="P53">[表]私が上昇した探検隊にいるなら、サボタージュする。（リザーブのカード最大1枚を対象とし、それを捨て札にする。）そうでないなら、私の探検隊は上昇する。（休息時まで、それは対戦相手の探検隊とその地域の地形で同点であったとしても前進できる。）</text:p>
      <text:p text:style-name="P53">スカウト<text:span text:style-name="T77">[1]（あなたは私を手札から[1]でプレイしてもよい。そうしたなら「[表]私をリザーブに送る。」を持つ。）</text:span></text:p>
      <text:p text:style-name="P53">[両面]<text:span text:style-name="T32">あなたは場（探検隊かランドマーク）やリザーブの対象のカード1つを増強してもよい。（それがカウンターを持っているなら、それは追加で</text:span><text:span text:style-name="T23">1個得る。ヒーローを対象にできない。）</text:span></text:p>
      <text:p text:style-name="P53">対戦相手1人が1枚以上のカードを引くか、リサプライした時-対象の探検隊にオーディスの新兵 1/1/1 兵士 トークン<text:span text:style-name="T77">1体を生成する。</text:span></text:p>
      <text:p text:style-name="P53">[両面]あなたは森の他のキャラクター1体を対象としてもよい。それは2ブーストを得る。（ブーストは+1/+1/+1カウンターである。探検隊を離れるとき、ブーストはなくなる。）</text:p>
      <text:p text:style-name="P53"><text:span text:style-name="T1">一過</text:span>（私がリザーブに送られるなら、代わりに捨て札にする。）</text:p>
      <text:p text:style-name="P53">今日の間、あなたがコントロールする手札コスト<text:span text:style-name="T77">[4]以上の各キャラクターはタフ[5]を持つ。（対戦相手が私を対象にするなら、[5]を追加で支払う。）</text:span></text:p>
      <text:p text:style-name="P53">スカウト<text:span text:style-name="T77">[2]（あなたは私を手札から[2]でプレイしてもよい。そうしたなら「[表]私をリザーブに送る。」を持つ。）</text:span></text:p>
      <text:p text:style-name="P68">[両面]あなたがコントロールする各動物/Animalは1ブーストを得る。(ブーストは+1/+1/+1カウンターである。探検隊を離れるとき、ブーストはなくなる。)</text:p>
      <text:p text:style-name="P68"><text:span text:style-name="T1">一過</text:span>（私がリザーブに送られるなら、代わりに捨て札にする。）</text:p>
      <text:p text:style-name="P68">1つを選ぶ:</text:p>
      <text:p text:style-name="P68">・<text:span text:style-name="T1">一過</text:span>を持つ対象の手札コスト[4]以下のキャラクターを捨て札にする。</text:p>
      <text:p text:style-name="P68">・対象の手札コスト[4]以下のパーマネントを捨て札にする。</text:p>
      <text:p text:style-name="P68">[表]あなたは対戦相手1人のリザーブの対象のカードを消耗してもよい。その後、6面ダイスを1個振る。こうして出目が1-3の時-その対戦相手はあなたのリザーブのカード1枚を対象とする。それを消耗する。（それは消耗している限り、サポート能力を失い、プレイできない。）</text:p>
      <text:p text:style-name="P67"><text:span text:style-name="T1">一過</text:span>（私がリザーブに送られるなら、代わりに捨て札にする。）</text:p>
      <text:p text:style-name="P67">1つを選ぶ:</text:p>
      <text:p text:style-name="P67">・対象の手札コスト<text:span text:style-name="T77">[4]以下のキャラクターをリザーブに送る。</text:span></text:p>
      <text:p text:style-name="P67">・対象の手札コスト<text:span text:style-name="T77">[4]以下のパーマネントを捨て札にする。</text:span></text:p>
      <text:p text:style-name="P67">あなたが2つ以上のランドマークをコントロールしているなら、対象の探検隊にブラスバグ 2/2/2 ロボット トークン<text:span text:style-name="T77">1体を生成する。</text:span></text:p>
      <text:p text:style-name="P67"><text:span text:style-name="T1">一過</text:span>（私がリザーブに送られるなら、代わりに捨て札にする。）</text:p>
      <text:p text:style-name="P67">1つを選ぶ。あなたの各探検隊が遅れているか同地であるなら、両方を選んでもよい:</text:p>
      <text:p text:style-name="P67">・カードを1枚引く。</text:p>
      <text:p text:style-name="P67">・対象の探検隊にオーディスの新兵 1/1/1 兵士 トークン<text:span text:style-name="T77">1体を生成する。</text:span></text:p>
      <text:p text:style-name="P67">望む数の探検隊に、4体のオーディスの新兵 1/1/1 兵士 トークンをあなたの望むように割り振って生成する。</text:p>
      <text:p text:style-name="P53">[両面]あなたは森の他のキャラクター1体を対象としてもよい。それは2ブーストを得る。（ブーストは+1/+1/+1カウンターである。探検隊を離れるとき、ブーストはなくなる。）</text:p>
      <text:p text:style-name="P9">[表]サボタージュする。（リザーブのカード最大1枚を対象とし、それを捨て札にする。）</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JP" svg:font-family="'Noto Sans JP'" style:font-family-generic="system" style:font-pitch="variable"/>
    <style:font-face style:name="Noto Serif JP" svg:font-family="'Noto Serif JP'" style:font-family-generic="system" style:font-pitch="variable"/>
    <style:font-face style:name="游ゴシック Light" svg:font-family="'游ゴシック Light'" style:font-family-generic="modern" style:font-pitch="variable"/>
    <style:font-face style:name="游ゴシック Light1" svg:font-family="'游ゴシック Light'" style:font-adornments="Regular" style:font-family-generic="moder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JP" style:font-size-asian="10.5pt" style:language-asian="ja" style:country-asian="JP"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JP" style:font-size-asian="10.5pt" style:language-asian="ja" style:country-asian="JP"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JP" style:font-family-asian="'Noto Sans JP'"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Header" style:family="paragraph" style:parent-style-name="Header_20_and_20_Footer" style:class="extra">
      <style:paragraph-properties text:number-lines="false" text:line-number="0">
        <style:tab-stops>
          <style:tab-stop style:position="10.001cm" style:type="center"/>
          <style:tab-stop style:position="20.003cm" style:type="right"/>
        </style:tab-stops>
      </style:paragraph-properties>
    </style:style>
    <style:style style:name="Footer" style:family="paragraph" style:parent-style-name="Header_20_and_20_Footer" style:class="extra">
      <style:paragraph-properties text:number-lines="false" text:line-number="0">
        <style:tab-stops>
          <style:tab-stop style:position="9.451cm" style:type="center"/>
          <style:tab-stop style:position="18.902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1.05cm" fo:margin-right="1.05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3" fo:column-gap="0.028cm">
          <style:column style:rel-width="21845*" fo:start-indent="0cm" fo:end-indent="0.014cm"/>
          <style:column style:rel-width="21845*" fo:start-indent="0.014cm" fo:end-indent="0.014cm"/>
          <style:column style:rel-width="21845*" fo:start-indent="0.014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2-23T19:51:22.908000000</meta:creation-date>
    <dc:date>2026-05-19T13:57:50.364000000</dc:date>
    <meta:editing-duration>PT18H52M15S</meta:editing-duration>
    <meta:editing-cycles>35</meta:editing-cycles>
    <meta:generator>LibreOffice/7.5.4.2$Windows_X86_64 LibreOffice_project/36ccfdc35048b057fd9854c757a8b67ec53977b6</meta:generator>
    <meta:document-statistic meta:table-count="0" meta:image-count="0" meta:object-count="0" meta:page-count="10" meta:paragraph-count="1097" meta:word-count="54775" meta:character-count="57081" meta:non-whitespace-character-count="56808"/>
  </office:meta>
</office:document-meta>
</file>